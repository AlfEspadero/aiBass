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415">
      <style:graphic-properties draw:fill="none" draw:stroke="solid" svg:stroke-width="0.01389in" svg:stroke-color="#000000" svg:stroke-opacity="100%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9">
      <style:graphic-properties draw:fill="none" draw:stroke="non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text" style:name="a119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6">
      <style:graphic-properties draw:fill="none" draw:stroke="non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03" style:parent-style-name="Graphics">
      <style:graphic-properties draw:fill="none" draw:stroke="none"/>
    </style:style>
    <style:style style:family="text" style:name="a91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4" style:parent-style-name="Graphics">
      <style:graphic-properties draw:fill="none" draw:stroke="non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draw:fill="none" draw:stroke="solid" svg:stroke-width="0.01389in" svg:stroke-color="#000000" svg:stroke-opacity="100%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draw:fill="none" draw:stroke="none"/>
    </style:style>
    <style:style style:family="text" style:name="a93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7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75" style:parent-style-name="Graphics">
      <style:graphic-properties draw:fill="none" draw:stroke="none"/>
    </style:style>
    <style:style style:family="graphic" style:name="a1476" style:parent-style-name="Graphics">
      <style:graphic-properties draw:fill="none" draw:stroke="none"/>
    </style:style>
    <style:style style:family="graphic" style:name="a1477" style:parent-style-name="Graphics">
      <style:graphic-properties draw:fill="none" draw:stroke="none"/>
    </style:style>
    <style:style style:family="text" style:name="a1478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6">
      <style:graphic-properties draw:fill="none" draw:stroke="solid" svg:stroke-width="0.01389in" svg:stroke-color="#000000" svg:stroke-opacity="100%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0c182c" draw:opacity="100%" draw:stroke="solid" svg:stroke-width="0.01042in" svg:stroke-color="#0c182c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solid" draw:fill-color="#e8f8f4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12223c" draw:opacity="100%" draw:stroke="solid" svg:stroke-width="0.01042in" svg:stroke-color="#12223c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draw:fill="none" draw:stroke="none"/>
    </style:style>
    <style:style style:family="text" style:name="a126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draw:fill="none" draw:stroke="solid" svg:stroke-width="0.01389in" svg:stroke-color="#000000" svg:stroke-opacity="100%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dce6f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1" style:parent-style-name="Graphics">
      <style:graphic-properties draw:fill="none" draw:stroke="none"/>
    </style:style>
    <style:style style:family="text" style:name="a753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82828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82828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82828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82828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 style:parent-style-name="Graphics">
      <style:graphic-properties draw:fill="none" draw:stroke="none"/>
    </style:style>
    <style:style style:family="presentation" style:name="a983">
      <style:graphic-properties draw:fill="none" draw:stroke="none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 style:parent-style-name="Graphics">
      <style:graphic-properties draw:fill="none" draw:stroke="none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7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82828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82828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draw:fill="none" draw:stroke="solid" svg:stroke-width="0.01389in" svg:stroke-color="#000000" svg:stroke-opacity="100%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c8d2d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solid" svg:stroke-width="0.01389in" svg:stroke-color="#000000" svg:stroke-opacity="100%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draw:fill="none" draw:stroke="non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solid" draw:fill-color="#e8f8f4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2">
      <style:graphic-properties draw:fill="none" draw:stroke="non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draw:fill="none" draw:stroke="solid" svg:stroke-width="0.01389in" svg:stroke-color="#000000" svg:stroke-opacity="100%"/>
    </style:style>
    <style:style style:family="paragraph" style:name="a1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draw:fill="none" draw:stroke="non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5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2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7">
      <style:paragraph-properties fo:line-height="15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3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41" style:parent-style-name="Graphics">
      <style:graphic-properties draw:fill="none" draw:stroke="none"/>
    </style:style>
    <style:style style:family="text" style:name="a1318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draw:fill="none" draw:stroke="solid" svg:stroke-width="0.01389in" svg:stroke-color="#000000" svg:stroke-opacity="100%"/>
    </style:style>
    <style:style style:family="text" style:name="a131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draw:fill="none" draw:stroke="none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5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5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7">
      <style:paragraph-properties fo:line-height="15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5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draw:fill="none" draw:stroke="none"/>
    </style:style>
    <style:style style:family="text" style:name="a134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4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draw:fill="none" draw:stroke="solid" svg:stroke-width="0.01389in" svg:stroke-color="#000000" svg:stroke-opacity="100%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draw:fill="none" draw:stroke="non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5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e6ecf8" draw:opacity="100%" draw:stroke="solid" svg:stroke-width="0.01042in" svg:stroke-color="#c8d2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e6ecf8" draw:opacity="100%" draw:stroke="solid" svg:stroke-width="0.01042in" svg:stroke-color="#c8d2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e6ecf8" draw:opacity="100%" draw:stroke="solid" svg:stroke-width="0.01042in" svg:stroke-color="#c8d2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solid" draw:fill-color="#30cfb1" draw:opacity="100%" draw:stroke="solid" svg:stroke-width="0.01042in" svg:stroke-color="#30cfb1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e6ecf8" draw:opacity="100%" draw:stroke="solid" svg:stroke-width="0.01042in" svg:stroke-color="#c8d2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center" draw:fill="solid" draw:fill-color="#e8f8f4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616">
      <style:graphic-properties draw:fill="none" draw:stroke="solid" svg:stroke-width="0.01389in" svg:stroke-color="#000000" svg:stroke-opacity="100%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0">
      <style:graphic-properties draw:fill="none" draw:stroke="none"/>
    </style:style>
    <style:style style:family="text" style:name="a139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08" style:parent-style-name="Graphics">
      <style:graphic-properties draw:fill="none" draw:stroke="none"/>
    </style:style>
    <style:style style:family="text" style:name="a140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e8f8f4" draw:opacity="100%" draw:stroke="solid" svg:stroke-width="0.01042in" svg:stroke-color="#dce0e6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none" draw:stroke="none"/>
    </style:style>
    <style:style style:family="text" style:name="a89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f5f7fa" draw:opacity="100%" draw:stroke="solid" svg:stroke-width="0.01042in" svg:stroke-color="#f5f7fa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6e768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4">
      <style:graphic-properties draw:fill="none" draw:stroke="solid" svg:stroke-width="0.02778in" svg:stroke-color="#000000" draw:marker-end="a1413" svg:stroke-opacity="100%" svg:stroke-linecap="butt" draw:shadow="visible" draw:shadow-offset-x="0in" draw:shadow-offset-y="0.02187in" draw:shadow-color="#000000" draw:shadow-opacity="38%"/>
    </style:style>
    <text:list-style style:name="a135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1" draw:style-name="a740" draw:master-page-name="Master1-Layout7-blank-Blank" presentation:presentation-page-layout-name="Master1-PPL7" draw:id="Slide-256">
        <draw:custom-shape svg:x="0in" svg:y="0in" svg:width="13.333in" svg:height="7.5in" draw:id="id69" draw:style-name="a743" draw:name="Rectangle 1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in" svg:y="0in" svg:width="5.5in" svg:height="7.5in" draw:id="id70" draw:style-name="a746" draw:name="Rectangle 2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749" draw:name="TextBox 3" svg:x="0.8in" svg:y="1.2in" svg:width="7.2in" svg:height="1.5in">
          <draw:text-box>
            <text:p text:style-name="a748" text:class-names="" text:cond-style-name=""><text:span text:style-name="a747" text:class-names="">aiBass</text:span></text:p>
          </draw:text-box>
          <svg:title/>
          <svg:desc/>
        </draw:frame>
        <draw:frame draw:id="id72" draw:style-name="a752" draw:name="TextBox 4" svg:x="0.8in" svg:y="2.4in" svg:width="7.4in" svg:height="1in">
          <draw:text-box>
            <text:p text:style-name="a751" text:class-names="" text:cond-style-name=""><text:span text:style-name="a750" text:class-names="">IA embebida para detección de notas
mediante señal inercial</text:span></text:p>
          </draw:text-box>
          <svg:title/>
          <svg:desc/>
        </draw:frame>
        <draw:frame draw:id="id73" draw:style-name="a767" draw:name="TextBox 5" svg:x="0.8in" svg:y="4.6in" svg:width="5.06082in" svg:height="0.84147in">
          <draw:text-box>
            <text:p text:style-name="a757" text:class-names="" text:cond-style-name=""><text:span text:style-name="a753" text:class-names="">Alfonso Espadero García</text:span><text:span text:style-name="a754" text:class-names=""><text:s text:c="1"/>· Ingeniería<text:s text:c="1"/></text:span><text:span text:style-name="a755" text:class-names="">Informática</text:span><text:span text:style-name="a756" text:class-names=""/></text:p>
            <text:p text:style-name="a761" text:class-names="" text:cond-style-name=""><text:span text:style-name="a758" text:class-names="">Tutoría</text:span><text:span text:style-name="a759" text:class-names="">: Ángel Jiménez Fernández · Daniel Casanueva Morato</text:span><text:span text:style-name="a760" text:class-names=""/></text:p>
            <text:p text:style-name="a766" text:class-names="" text:cond-style-name=""><text:span text:style-name="a762" text:class-names="">Convocatoria de mayo ·<text:s text:c="1"/></text:span><text:span text:style-name="a763" text:class-names="">Curso</text:span><text:span text:style-name="a764" text:class-names=""><text:s text:c="1"/>2025/2026</text:span><text:span text:style-name="a765" text:class-names=""/></text:p>
          </draw:text-box>
          <svg:title/>
          <svg:desc/>
        </draw:frame>
        <presentation:notes draw:style-name="a773">
          <draw:page-thumbnail draw:page-number="1" svg:x="0.75in" svg:y="1.25in" svg:width="6in" svg:height="3.375in" presentation:class="page" draw:id="id74" presentation:style-name="a768" draw:name="Slide Image Placeholder 1">
            <svg:title/>
            <svg:desc/>
          </draw:page-thumbnail>
          <draw:frame draw:id="id75" presentation:style-name="a771" draw:name="Notes Placeholder 2" svg:x="0.75in" svg:y="4.8125in" svg:width="6in" svg:height="3.9375in" presentation:class="notes" presentation:placeholder="false">
            <draw:text-box>
              <text:p text:style-name="a770" text:class-names="" text:cond-style-name=""><text:span text:style-name="a769" text:class-names="">Presentación de aiBass: sistema de IA embebida que identifica la nota tocada en un bajo eléctrico usando una IMU. En 10 minutos recorreré motivación, arquitectura, IA, resultados y futuro. La idea clave es evitar depender del audio y ofrecer una interfaz autónoma.</text:span></text:p>
            </draw:text-box>
            <svg:title/>
            <svg:desc/>
          </draw:frame>
          <draw:frame draw:id="id76" presentation:style-name="a772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2" draw:style-name="a774" draw:master-page-name="Master1-Layout7-blank-Blank" presentation:presentation-page-layout-name="Master1-PPL7" draw:id="Slide-257">
        <draw:custom-shape svg:x="0in" svg:y="0in" svg:width="13.333in" svg:height="7.5in" draw:id="id77" draw:style-name="a777" draw:name="Rectangle 1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78" draw:style-name="a780" draw:name="Rectangle 2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783" draw:name="TextBox 3" svg:x="0.6in" svg:y="0.35in" svg:width="12.2in" svg:height="0.6in">
          <draw:text-box>
            <text:p text:style-name="a782" text:class-names="" text:cond-style-name=""><text:span text:style-name="a781" text:class-names="">Agenda</text:span></text:p>
          </draw:text-box>
          <svg:title/>
          <svg:desc/>
        </draw:frame>
        <draw:frame draw:id="id80" draw:style-name="a829" draw:name="TextBox 4" svg:x="0.9in" svg:y="1.4in" svg:width="8.82472in" svg:height="5.45982in">
          <draw:text-box>
            <text:list text:style-name="a789">
              <text:list-item>
                <text:p text:style-name="a788" text:class-names="" text:cond-style-name=""><text:span text:style-name="a784" text:class-names="">Motivación</text:span><text:span text:style-name="a785" text:class-names=""><text:s text:c="1"/>y<text:s text:c="1"/></text:span><text:span text:style-name="a786" text:class-names="">objetivos</text:span><text:span text:style-name="a787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0" text:class-names="">Estado del<text:s text:c="1"/></text:span><text:span text:style-name="a791" text:class-names="">arte</text:span><text:span text:style-name="a792" text:class-names=""><text:s text:c="1"/>y<text:s text:c="1"/></text:span><text:span text:style-name="a793" text:class-names="">aportación</text:span><text:span text:style-name="a794" text:class-names=""><text:s text:c="1"/></text:span><text:span text:style-name="a795" text:class-names="">diferencial</text:span><text:span text:style-name="a796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799" text:class-names="">Tecnologías</text:span><text:span text:style-name="a800" text:class-names=""><text:s text:c="1"/>y<text:s text:c="1"/></text:span><text:span text:style-name="a801" text:class-names="">arquitectura</text:span><text:span text:style-name="a802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5" text:class-names="">IA<text:s text:c="1"/></text:span><text:span text:style-name="a806" text:class-names="">embebida</text:span><text:span text:style-name="a807" text:class-names="">: dataset y<text:s text:c="1"/></text:span><text:span text:style-name="a808" text:class-names="">modelo</text:span><text:span text:style-name="a809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2" text:class-names="">Firmware,<text:s text:c="1"/></text:span><text:span text:style-name="a813" text:class-names="">interfaz</text:span><text:span text:style-name="a814" text:class-names=""><text:s text:c="1"/>y<text:s text:c="1"/></text:span><text:span text:style-name="a815" text:class-names="">validación</text:span><text:span text:style-name="a816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19" text:class-names="">Planificación</text:span><text:span text:style-name="a820" text:class-names="">,<text:s text:c="1"/></text:span><text:span text:style-name="a821" text:class-names="">costes</text:span><text:span text:style-name="a822" text:class-names=""><text:s text:c="1"/>y<text:s text:c="1"/></text:span><text:span text:style-name="a823" text:class-names="">trabajo</text:span><text:span text:style-name="a824" text:class-names=""><text:s text:c="1"/></text:span><text:span text:style-name="a825" text:class-names="">futuro</text:span><text:span text:style-name="a826" text:class-names=""/></text:p>
              </text:list-item>
            </text:list>
          </draw:text-box>
          <svg:title/>
          <svg:desc/>
        </draw:frame>
        <draw:frame draw:id="id81" draw:style-name="a832" draw:name="TextBox 5" svg:x="0.6in" svg:y="7.1in" svg:width="12in" svg:height="0.3in">
          <draw:text-box>
            <text:p text:style-name="a831" text:class-names="" text:cond-style-name=""><text:span text:style-name="a830" text:class-names="">aiBass — TFG</text:span></text:p>
          </draw:text-box>
          <svg:title/>
          <svg:desc/>
        </draw:frame>
        <presentation:notes draw:style-name="a838">
          <draw:page-thumbnail draw:page-number="2" svg:x="0.75in" svg:y="1.25in" svg:width="6in" svg:height="3.375in" presentation:class="page" draw:id="id82" presentation:style-name="a833" draw:name="Slide Image Placeholder 1">
            <svg:title/>
            <svg:desc/>
          </draw:page-thumbnail>
          <draw:frame draw:id="id83" presentation:style-name="a836" draw:name="Notes Placeholder 2" svg:x="0.75in" svg:y="4.8125in" svg:width="6in" svg:height="3.9375in" presentation:class="notes" presentation:placeholder="false">
            <draw:text-box>
              <text:p text:style-name="a835" text:class-names="" text:cond-style-name=""><text:span text:style-name="a834" text:class-names="">Estructuro la defensa en seis bloques para ir de lo conceptual a lo técnico y cerrar con resultados y futuro. Me apoyaré en ejemplos y decisiones clave del desarrollo.</text:span></text:p>
            </draw:text-box>
            <svg:title/>
            <svg:desc/>
          </draw:frame>
          <draw:frame draw:id="id84" presentation:style-name="a837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3" draw:style-name="a839" draw:master-page-name="Master1-Layout7-blank-Blank" presentation:presentation-page-layout-name="Master1-PPL7" draw:id="Slide-258">
        <draw:custom-shape svg:x="0in" svg:y="0in" svg:width="13.333in" svg:height="7.5in" draw:id="id85" draw:style-name="a842" draw:name="Rectangle 1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86" draw:style-name="a845" draw:name="Rectangle 2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848" draw:name="TextBox 3" svg:x="0.6in" svg:y="0.35in" svg:width="12.2in" svg:height="0.6in">
          <draw:text-box>
            <text:p text:style-name="a847" text:class-names="" text:cond-style-name=""><text:span text:style-name="a846" text:class-names="">Motivación</text:span></text:p>
          </draw:text-box>
          <svg:title/>
          <svg:desc/>
        </draw:frame>
        <draw:frame draw:id="id88" draw:style-name="a890" draw:name="TextBox 4" svg:x="0.9in" svg:y="1.5in" svg:width="8.19839in" svg:height="1.21172in">
          <draw:text-box>
            <text:p text:style-name="a860" text:class-names="" text:cond-style-name=""><text:span text:style-name="a849" text:class-names="">Identificar</text:span><text:span text:style-name="a850" text:class-names=""><text:s text:c="1"/>la nota<text:s text:c="1"/></text:span><text:span text:style-name="a851" text:class-names="">ejecutada</text:span><text:span text:style-name="a852" text:class-names=""><text:s text:c="1"/></text:span><text:span text:style-name="a853" text:class-names="">sin<text:s text:c="1"/></text:span><text:span text:style-name="a854" text:class-names="">depender</text:span><text:span text:style-name="a855" text:class-names=""><text:s text:c="1"/>del<text:s text:c="1"/></text:span><text:span text:style-name="a856" text:class-names="">entorno</text:span><text:span text:style-name="a857" text:class-names=""><text:s text:c="1"/></text:span><text:span text:style-name="a858" text:class-names="">acústico</text:span><text:span text:style-name="a859" text:class-names="">.</text:span></text:p>
            <text:p text:style-name="a874" text:class-names="" text:cond-style-name=""><text:span text:style-name="a861" text:class-names="">Capturar</text:span><text:span text:style-name="a862" text:class-names=""><text:s text:c="1"/></text:span><text:span text:style-name="a863" text:class-names="">vibraciones</text:span><text:span text:style-name="a864" text:class-names=""><text:s text:c="1"/>locales con<text:s text:c="1"/></text:span><text:span text:style-name="a865" text:class-names="">una</text:span><text:span text:style-name="a866" text:class-names=""><text:s text:c="1"/>IMU<text:s text:c="1"/></text:span><text:span text:style-name="a867" text:class-names="">en</text:span><text:span text:style-name="a868" text:class-names=""><text:s text:c="1"/></text:span><text:span text:style-name="a869" text:class-names="">lugar</text:span><text:span text:style-name="a870" text:class-names=""><text:s text:c="1"/>del<text:s text:c="1"/></text:span><text:span text:style-name="a871" text:class-names="">sonido</text:span><text:span text:style-name="a872" text:class-names="">.</text:span><text:span text:style-name="a873" text:class-names=""/></text:p>
            <text:p text:style-name="a889" text:class-names="" text:cond-style-name=""><text:span text:style-name="a875" text:class-names="">Integrar</text:span><text:span text:style-name="a876" text:class-names=""><text:s text:c="1"/></text:span><text:span text:style-name="a877" text:class-names="">captura</text:span><text:span text:style-name="a878" text:class-names="">,<text:s text:c="1"/></text:span><text:span text:style-name="a879" text:class-names="">inferencia</text:span><text:span text:style-name="a880" text:class-names=""><text:s text:c="1"/></text:span><text:span text:style-name="a881" text:class-names="">y salida<text:s text:c="1"/></text:span><text:span text:style-name="a882" text:class-names="">en</text:span><text:span text:style-name="a883" text:class-names=""><text:s text:c="1"/>un<text:s text:c="1"/></text:span><text:span text:style-name="a884" text:class-names="">prototipo</text:span><text:span text:style-name="a885" text:class-names=""><text:s text:c="1"/></text:span><text:span text:style-name="a886" text:class-names="">autónomo</text:span><text:span text:style-name="a887" text:class-names="">.</text:span><text:span text:style-name="a888" text:class-names=""/></text:p>
          </draw:text-box>
          <svg:title/>
          <svg:desc/>
        </draw:frame>
        <draw:custom-shape svg:x="0.9in" svg:y="5.6in" svg:width="11.8in" svg:height="1.2in" draw:id="id89" draw:style-name="a893" draw:name="Rectangle 5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98" draw:name="TextBox 6" svg:x="1.2in" svg:y="5.8in" svg:width="11.2in" svg:height="0.8in">
          <draw:text-box>
            <text:p text:style-name="a895" text:class-names="" text:cond-style-name=""><text:span text:style-name="a894" text:class-names="">Idea clave</text:span></text:p>
            <text:p text:style-name="a897" text:class-names="" text:cond-style-name=""><text:span text:style-name="a896" text:class-names="">Sensórica inercial + IA embebida ⇒ clasificación discreta de notas</text:span></text:p>
          </draw:text-box>
          <svg:title/>
          <svg:desc/>
        </draw:frame>
        <draw:frame draw:id="id91" draw:style-name="a901" draw:name="TextBox 7" svg:x="0.6in" svg:y="7.1in" svg:width="12in" svg:height="0.3in">
          <draw:text-box>
            <text:p text:style-name="a900" text:class-names="" text:cond-style-name=""><text:span text:style-name="a899" text:class-names="">aiBass — TFG</text:span></text:p>
          </draw:text-box>
          <svg:title/>
          <svg:desc/>
        </draw:frame>
        <presentation:notes draw:style-name="a907">
          <draw:page-thumbnail draw:page-number="3" svg:x="0.75in" svg:y="1.25in" svg:width="6in" svg:height="3.375in" presentation:class="page" draw:id="id92" presentation:style-name="a902" draw:name="Slide Image Placeholder 1">
            <svg:title/>
            <svg:desc/>
          </draw:page-thumbnail>
          <draw:frame draw:id="id93" presentation:style-name="a905" draw:name="Notes Placeholder 2" svg:x="0.75in" svg:y="4.8125in" svg:width="6in" svg:height="3.9375in" presentation:class="notes" presentation:placeholder="false">
            <draw:text-box>
              <text:p text:style-name="a904" text:class-names="" text:cond-style-name=""><text:span text:style-name="a903" text:class-names="">La motivación principal es evitar la dependencia del audio, que es sensible al entorno y a la mezcla. En lugar de eso, capturo vibraciones con una IMU. El objetivo es demostrar un prototipo autónomo que pueda ofrecer feedback al músico sin PC.</text:span></text:p>
            </draw:text-box>
            <svg:title/>
            <svg:desc/>
          </draw:frame>
          <draw:frame draw:id="id94" presentation:style-name="a906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4" draw:style-name="a908" draw:master-page-name="Master1-Layout7-blank-Blank" presentation:presentation-page-layout-name="Master1-PPL7" draw:id="Slide-259">
        <draw:custom-shape svg:x="0in" svg:y="0in" svg:width="13.333in" svg:height="7.5in" draw:id="id95" draw:style-name="a911" draw:name="Rectangle 1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96" draw:style-name="a914" draw:name="Rectangle 2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917" draw:name="TextBox 3" svg:x="0.6in" svg:y="0.35in" svg:width="12.2in" svg:height="0.6in">
          <draw:text-box>
            <text:p text:style-name="a916" text:class-names="" text:cond-style-name=""><text:span text:style-name="a915" text:class-names="">Objetivos del proyecto</text:span></text:p>
          </draw:text-box>
          <svg:title/>
          <svg:desc/>
        </draw:frame>
        <draw:frame draw:id="id98" draw:style-name="a975" draw:name="TextBox 4" svg:x="0.9in" svg:y="1.5in" svg:width="10.10733in" svg:height="3.56209in">
          <draw:text-box>
            <text:list text:style-name="a928">
              <text:list-item>
                <text:p text:style-name="a927" text:class-names="" text:cond-style-name=""><text:span text:style-name="a918" text:class-names="">Diseñar</text:span><text:span text:style-name="a919" text:class-names=""><text:s text:c="1"/>la<text:s text:c="1"/></text:span><text:span text:style-name="a920" text:class-names="">cadena</text:span><text:span text:style-name="a921" text:class-names=""><text:s text:c="1"/>completa de<text:s text:c="1"/></text:span><text:span text:style-name="a922" text:class-names="">detección</text:span><text:span text:style-name="a923" text:class-names=""><text:s text:c="1"/>de<text:s text:c="1"/></text:span><text:span text:style-name="a924" text:class-names="">notas</text:span><text:span text:style-name="a925" text:class-names=""><text:s text:c="1"/>con IMU.</text:span><text:span text:style-name="a926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29" text:class-names="">Entrenar</text:span><text:span text:style-name="a930" text:class-names=""><text:s text:c="1"/>un<text:s text:c="1"/></text:span><text:span text:style-name="a931" text:class-names="">clasificador</text:span><text:span text:style-name="a932" text:class-names=""><text:s text:c="1"/></text:span><text:span text:style-name="a933" text:class-names="">multiclase</text:span><text:span text:style-name="a934" text:class-names=""><text:s text:c="1"/></text:span><text:span text:style-name="a935" text:class-names="">embebido</text:span><text:span text:style-name="a936" text:class-names="">.</text:span><text:span text:style-name="a93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0" text:class-names="">Clasificar</text:span><text:span text:style-name="a941" text:class-names=""><text:s text:c="1"/>E, A, D, G y<text:s text:c="1"/></text:span><text:span text:style-name="a942" text:class-names="">ruido</text:span><text:span text:style-name="a943" text:class-names="">/</text:span><text:span text:style-name="a944" text:class-names="">silencio</text:span><text:span text:style-name="a945" text:class-names=""><text:s text:c="1"/></text:span><text:span text:style-name="a946" text:class-names="">en</text:span><text:span text:style-name="a947" text:class-names=""><text:s text:c="1"/></text:span><text:span text:style-name="a948" text:class-names="">tiempo</text:span><text:span text:style-name="a949" text:class-names=""><text:s text:c="1"/>real.</text:span><text:span text:style-name="a95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53" text:class-names="">Incorporar</text:span><text:span text:style-name="a954" text:class-names=""><text:s text:c="1"/></text:span><text:span text:style-name="a955" text:class-names="">una</text:span><text:span text:style-name="a956" text:class-names=""><text:s text:c="1"/></text:span><text:span text:style-name="a957" text:class-names="">interfaz</text:span><text:span text:style-name="a958" text:class-names=""><text:s text:c="1"/></text:span><text:span text:style-name="a959" text:class-names="">autónoma</text:span><text:span text:style-name="a960" text:class-names=""><text:s text:c="1"/></text:span><text:span text:style-name="a961" text:class-names="">mediante</text:span><text:span text:style-name="a962" text:class-names=""><text:s text:c="1"/>LED WS2812.</text:span><text:span text:style-name="a963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66" text:class-names="">Estructurar</text:span><text:span text:style-name="a967" text:class-names=""><text:s text:c="1"/>firmware<text:s text:c="1"/></text:span><text:span text:style-name="a968" text:class-names="">escalable</text:span><text:span text:style-name="a969" text:class-names=""><text:s text:c="1"/>con<text:s text:c="1"/></text:span><text:span text:style-name="a970" text:class-names="">FreeRTOS</text:span><text:span text:style-name="a971" text:class-names="">.</text:span><text:span text:style-name="a972" text:class-names=""/></text:p>
              </text:list-item>
            </text:list>
          </draw:text-box>
          <svg:title/>
          <svg:desc/>
        </draw:frame>
        <draw:frame draw:id="id99" draw:style-name="a978" draw:name="TextBox 5" svg:x="0.6in" svg:y="7.1in" svg:width="12in" svg:height="0.3in">
          <draw:text-box>
            <text:p text:style-name="a977" text:class-names="" text:cond-style-name=""><text:span text:style-name="a976" text:class-names="">aiBass — TFG</text:span></text:p>
          </draw:text-box>
          <svg:title/>
          <svg:desc/>
        </draw:frame>
        <presentation:notes draw:style-name="a984">
          <draw:page-thumbnail draw:page-number="4" svg:x="0.75in" svg:y="1.25in" svg:width="6in" svg:height="3.375in" presentation:class="page" draw:id="id100" presentation:style-name="a979" draw:name="Slide Image Placeholder 1">
            <svg:title/>
            <svg:desc/>
          </draw:page-thumbnail>
          <draw:frame draw:id="id101" presentation:style-name="a982" draw:name="Notes Placeholder 2" svg:x="0.75in" svg:y="4.8125in" svg:width="6in" svg:height="3.9375in" presentation:class="notes" presentation:placeholder="false">
            <draw:text-box>
              <text:p text:style-name="a981" text:class-names="" text:cond-style-name=""><text:span text:style-name="a980" text:class-names="">Los objetivos combinan hardware, IA y firmware: capturar señal, entrenar el modelo, clasificar clases musicales discretas y ofrecer feedback local. Además, la arquitectura con FreeRTOS se planteó para facilitar futuras ampliaciones.</text:span></text:p>
            </draw:text-box>
            <svg:title/>
            <svg:desc/>
          </draw:frame>
          <draw:frame draw:id="id102" presentation:style-name="a983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5" draw:style-name="a985" draw:master-page-name="Master1-Layout7-blank-Blank" presentation:presentation-page-layout-name="Master1-PPL7" draw:id="Slide-260">
        <draw:custom-shape svg:x="0in" svg:y="0in" svg:width="13.333in" svg:height="7.5in" draw:id="id103" draw:style-name="a988" draw:name="Rectangle 1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104" draw:style-name="a991" draw:name="Rectangle 2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994" draw:name="TextBox 3" svg:x="0.6in" svg:y="0.35in" svg:width="12.2in" svg:height="0.6in">
          <draw:text-box>
            <text:p text:style-name="a993" text:class-names="" text:cond-style-name=""><text:span text:style-name="a992" text:class-names="">Estado del arte</text:span></text:p>
          </draw:text-box>
          <svg:title/>
          <svg:desc/>
        </draw:frame>
        <draw:frame draw:id="id106" draw:style-name="a1029" draw:name="TextBox 4" svg:x="0.9in" svg:y="1.6in" svg:width="9.76065in" svg:height="1.21172in">
          <draw:text-box>
            <text:p text:style-name="a1009" text:class-names="" text:cond-style-name=""><text:span text:style-name="a995" text:class-names="">Afinadores</text:span><text:span text:style-name="a996" text:class-names=""><text:s text:c="1"/></text:span><text:span text:style-name="a997" text:class-names="">por</text:span><text:span text:style-name="a998" text:class-names=""><text:s text:c="1"/>audio:<text:s text:c="1"/></text:span><text:span text:style-name="a999" text:class-names="">alta</text:span><text:span text:style-name="a1000" text:class-names=""><text:s text:c="1"/></text:span><text:span text:style-name="a1001" text:class-names="">precisión</text:span><text:span text:style-name="a1002" text:class-names="">,<text:s text:c="1"/></text:span><text:span text:style-name="a1003" text:class-names="">pero</text:span><text:span text:style-name="a1004" text:class-names=""><text:s text:c="1"/></text:span><text:span text:style-name="a1005" text:class-names="">sensibles</text:span><text:span text:style-name="a1006" text:class-names=""><text:s text:c="1"/>al<text:s text:c="1"/></text:span><text:span text:style-name="a1007" text:class-names="">entorno</text:span><text:span text:style-name="a1008" text:class-names="">.</text:span></text:p>
            <text:p text:style-name="a1026" text:class-names="" text:cond-style-name=""><text:span text:style-name="a1010" text:class-names="">Trabajos</text:span><text:span text:style-name="a1011" text:class-names=""><text:s text:c="1"/></text:span><text:span text:style-name="a1012" text:class-names="">cercanos</text:span><text:span text:style-name="a1013" text:class-names=""><text:s text:c="1"/>con IA<text:s text:c="1"/></text:span><text:span text:style-name="a1014" text:class-names="">embebida</text:span><text:span text:style-name="a1015" text:class-names=""><text:s text:c="1"/>y<text:s text:c="1"/></text:span><text:span text:style-name="a1016" text:class-names="">sensores</text:span><text:span text:style-name="a1017" text:class-names="">:<text:s text:c="1"/></text:span><text:span text:style-name="a1018" text:class-names="">foco</text:span><text:span text:style-name="a1019" text:class-names=""><text:s text:c="1"/></text:span><text:span text:style-name="a1020" text:class-names="">en</text:span><text:span text:style-name="a1021" text:class-names=""><text:s text:c="1"/></text:span><text:span text:style-name="a1022" text:class-names="">clasificación</text:span><text:span text:style-name="a1023" text:class-names=""><text:s text:c="1"/></text:span><text:span text:style-name="a1024" text:class-names="">discreta</text:span><text:span text:style-name="a1025" text:class-names="">.</text:span></text:p>
            <text:p text:style-name="a1028" text:class-names="" text:cond-style-name=""><text:span text:style-name="a1027" text:class-names=""/></text:p>
          </draw:text-box>
          <svg:title/>
          <svg:desc/>
        </draw:frame>
        <draw:custom-shape svg:x="0.9in" svg:y="5.6in" svg:width="11.8in" svg:height="1.2in" draw:id="id107" draw:style-name="a1032" draw:name="Rectangle 5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1037" draw:name="TextBox 6" svg:x="1.2in" svg:y="5.8in" svg:width="11.2in" svg:height="0.8in">
          <draw:text-box>
            <text:p text:style-name="a1034" text:class-names="" text:cond-style-name=""><text:span text:style-name="a1033" text:class-names="">Aportación diferencial</text:span></text:p>
            <text:p text:style-name="a1036" text:class-names="" text:cond-style-name=""><text:span text:style-name="a1035" text:class-names="">Vía alternativa: vibración mecánica + IA embebida con salida autónoma</text:span></text:p>
          </draw:text-box>
          <svg:title/>
          <svg:desc/>
        </draw:frame>
        <draw:frame draw:id="id109" draw:style-name="a1040" draw:name="TextBox 7" svg:x="0.6in" svg:y="7.1in" svg:width="12in" svg:height="0.3in">
          <draw:text-box>
            <text:p text:style-name="a1039" text:class-names="" text:cond-style-name=""><text:span text:style-name="a1038" text:class-names="">aiBass — TFG</text:span></text:p>
          </draw:text-box>
          <svg:title/>
          <svg:desc/>
        </draw:frame>
        <draw:frame draw:id="id110" draw:style-name="a1041" draw:name="Picture 8" svg:x="0.90362in" svg:y="2.54354in" svg:width="2.14408in" svg:height="2.2912in" style:rel-width="scale" style:rel-height="scale">
          <draw:image xlink:href="media/image1.png" xlink:type="simple" xlink:show="embed" xlink:actuate="onLoad"/>
          <svg:title/>
          <svg:desc>A circuit board with wires and a display

AI-generated content may be incorrect.</svg:desc>
        </draw:frame>
        <draw:frame draw:id="id112" draw:style-name="a1047" draw:name="TextBox 9" svg:x="0.90334in" svg:y="4.99912in" svg:width="2.13444in" svg:height="0.31229in">
          <draw:text-box>
            <text:p text:style-name="a1046" text:class-names="" text:cond-style-name="" text:id="id111"><text:span text:style-name="a1042" text:class-names="">TFG </text:span><text:span text:style-name="a1043" text:class-names="">Irene Romero<text:s text:c="1"/></text:span><text:span text:style-name="a1044" text:class-names="">Romero</text:span><text:span text:style-name="a1045" text:class-names=""/></text:p>
          </draw:text-box>
          <svg:title/>
          <svg:desc/>
        </draw:frame>
        <draw:frame draw:id="id113" draw:style-name="a1048" draw:name="Picture 10" svg:x="7.43229in" svg:y="2.54377in" svg:width="5.2665in" svg:height="2.96489in" style:rel-width="scale" style:rel-height="scale">
          <draw:image xlink:href="media/image2.png" xlink:type="simple" xlink:show="embed" xlink:actuate="onLoad"/>
          <svg:title/>
          <svg:desc/>
        </draw:frame>
        <draw:frame draw:id="id114" draw:style-name="a1049" draw:name="Picture 13" svg:x="4.41952in" svg:y="2.54682in" svg:width="1.78831in" svg:height="2.28464in" style:rel-width="scale" style:rel-height="scale">
          <draw:image xlink:href="media/image3.png" xlink:type="simple" xlink:show="embed" xlink:actuate="onLoad"/>
          <svg:title/>
          <svg:desc>A close up of a device

AI-generated content may be incorrect.</svg:desc>
        </draw:frame>
        <draw:frame draw:id="id115" draw:style-name="a1053" draw:name="TextBox 15" svg:x="4.24604in" svg:y="4.99912in" svg:width="2.13444in" svg:height="0.31229in">
          <draw:text-box>
            <text:p text:style-name="a1052" text:class-names="" text:cond-style-name=""><text:span text:style-name="a1050" text:class-names="">aiBass</text:span><text:span text:style-name="a1051" text:class-names=""/></text:p>
          </draw:text-box>
          <svg:title/>
          <svg:desc/>
        </draw:frame>
        <presentation:notes draw:style-name="a1059">
          <draw:page-thumbnail draw:page-number="5" svg:x="0.75in" svg:y="1.25in" svg:width="6in" svg:height="3.375in" presentation:class="page" draw:id="id116" presentation:style-name="a1054" draw:name="Slide Image Placeholder 1">
            <svg:title/>
            <svg:desc/>
          </draw:page-thumbnail>
          <draw:frame draw:id="id117" presentation:style-name="a1057" draw:name="Notes Placeholder 2" svg:x="0.75in" svg:y="4.8125in" svg:width="6in" svg:height="3.9375in" presentation:class="notes" presentation:placeholder="false">
            <draw:text-box>
              <text:p text:style-name="a1056" text:class-names="" text:cond-style-name=""><text:span text:style-name="a1055" text:class-names="">En el estado del arte destaco afinadores por audio y trabajos cercanos en IA embebida. En mi caso, el diferencial es el uso de vibración local con una IMU y un sistema autónomo con salida LED. Sustituiré aquí las referencias concretas de la memoria.</text:span></text:p>
            </draw:text-box>
            <svg:title/>
            <svg:desc/>
          </draw:frame>
          <draw:frame draw:id="id118" presentation:style-name="a1058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6" draw:style-name="a1060" draw:master-page-name="Master1-Layout7-blank-Blank" presentation:presentation-page-layout-name="Master1-PPL7" draw:id="Slide-261">
        <draw:custom-shape svg:x="0in" svg:y="0in" svg:width="13.333in" svg:height="7.5in" draw:id="id119" draw:style-name="a1063" draw:name="Rectangle 1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120" draw:style-name="a1066" draw:name="Rectangle 2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1069" draw:name="TextBox 3" svg:x="0.6in" svg:y="0.35in" svg:width="12.2in" svg:height="0.6in">
          <draw:text-box>
            <text:p text:style-name="a1068" text:class-names="" text:cond-style-name=""><text:span text:style-name="a1067" text:class-names="">Tecnologías y arquitectura</text:span></text:p>
          </draw:text-box>
          <svg:title/>
          <svg:desc/>
        </draw:frame>
        <draw:custom-shape svg:x="0.9in" svg:y="1.6in" svg:width="4.92913in" svg:height="1.06156in" draw:id="id122" draw:style-name="a1072" draw:name="Rectangle 4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1077" draw:name="TextBox 5" svg:x="1.2in" svg:y="1.8in" svg:width="5.2in" svg:height="1.6in">
          <draw:text-box>
            <text:p text:style-name="a1074" text:class-names="" text:cond-style-name=""><text:span text:style-name="a1073" text:class-names="">STM32L4</text:span></text:p>
            <text:p text:style-name="a1076" text:class-names="" text:cond-style-name=""><text:span text:style-name="a1075" text:class-names="">MCU Cortex‑M4 en kit Discovery</text:span></text:p>
          </draw:text-box>
          <svg:title/>
          <svg:desc/>
        </draw:frame>
        <draw:custom-shape svg:x="7in" svg:y="1.6in" svg:width="5.8in" svg:height="2in" draw:id="id124" draw:style-name="a1080" draw:name="Rectangle 6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1085" draw:name="TextBox 7" svg:x="7.3in" svg:y="1.8in" svg:width="4.41922in" svg:height="0.67318in">
          <draw:text-box>
            <text:p text:style-name="a1082" text:class-names="" text:cond-style-name=""><text:span text:style-name="a1081" text:class-names="">LSM6DSL</text:span></text:p>
            <text:p text:style-name="a1084" text:class-names="" text:cond-style-name=""><text:span text:style-name="a1083" text:class-names="">IMU 6 ejes integrada</text:span></text:p>
          </draw:text-box>
          <svg:title/>
          <svg:desc/>
        </draw:frame>
        <draw:custom-shape svg:x="0.9in" svg:y="3.9in" svg:width="4.92913in" svg:height="1.06156in" draw:id="id126" draw:style-name="a1088" draw:name="Rectangle 8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1093" draw:name="TextBox 9" svg:x="1.2in" svg:y="4.1in" svg:width="5.2in" svg:height="1.6in">
          <draw:text-box>
            <text:p text:style-name="a1090" text:class-names="" text:cond-style-name=""><text:span text:style-name="a1089" text:class-names="">NanoEdge AI</text:span></text:p>
            <text:p text:style-name="a1092" text:class-names="" text:cond-style-name=""><text:span text:style-name="a1091" text:class-names="">Clasificador embebido multiclase</text:span></text:p>
          </draw:text-box>
          <svg:title/>
          <svg:desc/>
        </draw:frame>
        <draw:custom-shape svg:x="7in" svg:y="3.9in" svg:width="4.92913in" svg:height="1.06156in" draw:id="id128" draw:style-name="a1096" draw:name="Rectangle 10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1101" draw:name="TextBox 11" svg:x="7.3in" svg:y="4.1in" svg:width="5.2in" svg:height="1.6in">
          <draw:text-box>
            <text:p text:style-name="a1098" text:class-names="" text:cond-style-name=""><text:span text:style-name="a1097" text:class-names="">FreeRTOS</text:span></text:p>
            <text:p text:style-name="a1100" text:class-names="" text:cond-style-name=""><text:span text:style-name="a1099" text:class-names="">Tareas + eventos para escalabilidad</text:span></text:p>
          </draw:text-box>
          <svg:title/>
          <svg:desc/>
        </draw:frame>
        <draw:custom-shape svg:x="0.9in" svg:y="5.75706in" svg:width="4.92913in" svg:height="1.06156in" draw:id="id130" draw:style-name="a1104" draw:name="Rectangle 12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1109" draw:name="TextBox 13" svg:x="1.2in" svg:y="5.95706in" svg:width="4.32162in" svg:height="0.67318in">
          <draw:text-box>
            <text:p text:style-name="a1106" text:class-names="" text:cond-style-name=""><text:span text:style-name="a1105" text:class-names="">WS2812</text:span></text:p>
            <text:p text:style-name="a1108" text:class-names="" text:cond-style-name=""><text:span text:style-name="a1107" text:class-names="">Salida visual local</text:span></text:p>
          </draw:text-box>
          <svg:title/>
          <svg:desc/>
        </draw:frame>
        <draw:frame draw:id="id132" draw:style-name="a1112" draw:name="TextBox 14" svg:x="0.6in" svg:y="7.1in" svg:width="12in" svg:height="0.3in">
          <draw:text-box>
            <text:p text:style-name="a1111" text:class-names="" text:cond-style-name=""><text:span text:style-name="a1110" text:class-names="">aiBass — TFG</text:span></text:p>
          </draw:text-box>
          <svg:title/>
          <svg:desc/>
        </draw:frame>
        <presentation:notes draw:style-name="a1118">
          <draw:page-thumbnail draw:page-number="6" svg:x="0.75in" svg:y="1.25in" svg:width="6in" svg:height="3.375in" presentation:class="page" draw:id="id133" presentation:style-name="a1113" draw:name="Slide Image Placeholder 1">
            <svg:title/>
            <svg:desc/>
          </draw:page-thumbnail>
          <draw:frame draw:id="id134" presentation:style-name="a1116" draw:name="Notes Placeholder 2" svg:x="0.75in" svg:y="4.8125in" svg:width="6in" svg:height="3.9375in" presentation:class="notes" presentation:placeholder="false">
            <draw:text-box>
              <text:p text:style-name="a1115" text:class-names="" text:cond-style-name=""><text:span text:style-name="a1114" text:class-names="">El stack combina MCU STM32, IMU LSM6DSL, NanoEdge AI para inferencia, FreeRTOS para organizar tareas y WS2812 para feedback. Esta combinación permite un prototipo completo sin depender de un PC.</text:span></text:p>
            </draw:text-box>
            <svg:title/>
            <svg:desc/>
          </draw:frame>
          <draw:frame draw:id="id135" presentation:style-name="a1117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7" draw:style-name="a1119" draw:master-page-name="Master1-Layout7-blank-Blank" presentation:presentation-page-layout-name="Master1-PPL7" draw:id="Slide-262">
        <draw:custom-shape svg:x="0in" svg:y="0in" svg:width="13.333in" svg:height="7.5in" draw:id="id136" draw:style-name="a1122" draw:name="Rectangle 1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137" draw:style-name="a1125" draw:name="Rectangle 2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1128" draw:name="TextBox 3" svg:x="0.6in" svg:y="0.35in" svg:width="12.2in" svg:height="0.6in">
          <draw:text-box>
            <text:p text:style-name="a1127" text:class-names="" text:cond-style-name=""><text:span text:style-name="a1126" text:class-names="">Flujo funcional</text:span></text:p>
          </draw:text-box>
          <svg:title/>
          <svg:desc/>
        </draw:frame>
        <draw:custom-shape svg:x="1.08727in" svg:y="2.59064in" svg:width="2.33483in" svg:height="0.88764in" draw:id="id139" draw:style-name="a1131" draw:name="Rounded Rectangle 4">
          <svg:title/>
          <svg:desc/>
          <text:p text:style-name="a1130" text:class-names="" text:cond-style-name=""><text:span text:style-name="a1129" text:class-names="">Captura IMU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45in" svg:y="2.85in" svg:width="0.6in" svg:height="0.5in" draw:id="id140" draw:style-name="a1134" draw:name="Right Arrow 5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6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4.08727in" svg:y="2.59064in" svg:width="2.33483in" svg:height="0.88764in" draw:id="id141" draw:style-name="a1137" draw:name="Rounded Rectangle 6">
          <svg:title/>
          <svg:desc/>
          <text:p text:style-name="a1136" text:class-names="" text:cond-style-name=""><text:span text:style-name="a1135" text:class-names="">Preprocesado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45in" svg:y="2.85in" svg:width="0.6in" svg:height="0.5in" draw:id="id142" draw:style-name="a1140" draw:name="Right Arrow 7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6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08727in" svg:y="2.59064in" svg:width="2.33483in" svg:height="0.88764in" draw:id="id143" draw:style-name="a1143" draw:name="Rounded Rectangle 8">
          <svg:title/>
          <svg:desc/>
          <text:p text:style-name="a1142" text:class-names="" text:cond-style-name=""><text:span text:style-name="a1141" text:class-names="">Clasificació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45in" svg:y="2.85in" svg:width="0.6in" svg:height="0.5in" draw:id="id144" draw:style-name="a1146" draw:name="Right Arrow 9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6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0.08727in" svg:y="2.59064in" svg:width="2.33483in" svg:height="0.88764in" draw:id="id145" draw:style-name="a1149" draw:name="Rounded Rectangle 10">
          <svg:title/>
          <svg:desc/>
          <text:p text:style-name="a1148" text:class-names="" text:cond-style-name=""><text:span text:style-name="a1147" text:class-names="">Salida UART + LED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46" draw:style-name="a1174" draw:name="TextBox 11" svg:x="0.9in" svg:y="4.2in" svg:width="8.82549in" svg:height="1.21172in">
          <draw:text-box>
            <text:p text:style-name="a1160" text:class-names="" text:cond-style-name=""><text:span text:style-name="a1150" text:class-names="">Orquestación</text:span><text:span text:style-name="a1151" text:class-names=""><text:s text:c="1"/>con<text:s text:c="1"/></text:span><text:span text:style-name="a1152" text:class-names="">FreeRTOS</text:span><text:span text:style-name="a1153" text:class-names=""><text:s text:c="1"/>para<text:s text:c="1"/></text:span><text:span text:style-name="a1154" text:class-names="">desacoplar</text:span><text:span text:style-name="a1155" text:class-names=""><text:s text:c="1"/></text:span><text:span text:style-name="a1156" text:class-names="">adquisición</text:span><text:span text:style-name="a1157" text:class-names=""><text:s text:c="1"/>e<text:s text:c="1"/></text:span><text:span text:style-name="a1158" text:class-names="">inferencia</text:span><text:span text:style-name="a1159" text:class-names="">.</text:span></text:p>
            <text:p text:style-name="a1162" text:class-names="" text:cond-style-name=""><text:span text:style-name="a1161" text:class-names=""/></text:p>
            <text:p text:style-name="a1173" text:class-names="" text:cond-style-name=""><text:span text:style-name="a1163" text:class-names="">Limitación</text:span><text:span text:style-name="a1164" text:class-names=""><text:s text:c="1"/>actual</text:span><text:span text:style-name="a1165" text:class-names="">:<text:s text:c="1"/></text:span><text:span text:style-name="a1166" text:class-names="">clasificación</text:span><text:span text:style-name="a1167" text:class-names=""><text:s text:c="1"/></text:span><text:span text:style-name="a1168" text:class-names="">discreta</text:span><text:span text:style-name="a1169" text:class-names=""><text:s text:c="1"/>(sin<text:s text:c="1"/></text:span><text:span text:style-name="a1170" text:class-names="">centésimas</text:span><text:span text:style-name="a1171" text:class-names="">).</text:span><text:span text:style-name="a1172" text:class-names=""/></text:p>
          </draw:text-box>
          <svg:title/>
          <svg:desc/>
        </draw:frame>
        <draw:frame draw:id="id147" draw:style-name="a1177" draw:name="TextBox 12" svg:x="0.6in" svg:y="7.1in" svg:width="12in" svg:height="0.3in">
          <draw:text-box>
            <text:p text:style-name="a1176" text:class-names="" text:cond-style-name=""><text:span text:style-name="a1175" text:class-names="">aiBass — TFG</text:span></text:p>
          </draw:text-box>
          <svg:title/>
          <svg:desc/>
        </draw:frame>
        <presentation:notes draw:style-name="a1183">
          <draw:page-thumbnail draw:page-number="7" svg:x="0.75in" svg:y="1.25in" svg:width="6in" svg:height="3.375in" presentation:class="page" draw:id="id148" presentation:style-name="a1178" draw:name="Slide Image Placeholder 1">
            <svg:title/>
            <svg:desc/>
          </draw:page-thumbnail>
          <draw:frame draw:id="id149" presentation:style-name="a1181" draw:name="Notes Placeholder 2" svg:x="0.75in" svg:y="4.8125in" svg:width="6in" svg:height="3.9375in" presentation:class="notes" presentation:placeholder="false">
            <draw:text-box>
              <text:p text:style-name="a1180" text:class-names="" text:cond-style-name=""><text:span text:style-name="a1179" text:class-names="">Este es el pipeline end‑to‑end. FreeRTOS separa adquisición, preprocesado y clasificación. Actualmente, NanoEdge AI ofrece clasificación discreta, por lo que no se reportan centésimas de afinación; queda como mejora futura.</text:span></text:p>
            </draw:text-box>
            <svg:title/>
            <svg:desc/>
          </draw:frame>
          <draw:frame draw:id="id150" presentation:style-name="a1182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14" draw:style-name="a1184" draw:master-page-name="Master1-Layout7-blank-Blank" presentation:presentation-page-layout-name="Master1-PPL7" draw:id="Slide-269">
        <draw:custom-shape svg:x="0in" svg:y="0in" svg:width="13.333in" svg:height="7.5in" draw:id="id151" draw:style-name="a1187" draw:name="Rectangle 1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152" draw:style-name="a1190" draw:name="Rectangle 2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1199" draw:name="TextBox 3" svg:x="0.6in" svg:y="0.35in" svg:width="4.27257in" svg:height="0.60586in">
          <draw:text-box>
            <text:p text:style-name="a1198" text:class-names="" text:cond-style-name=""><text:span text:style-name="a1191" text:class-names="">Flujo</text:span><text:span text:style-name="a1192" text:class-names=""><text:s text:c="1"/></text:span><text:span text:style-name="a1193" text:class-names="">funcional</text:span><text:span text:style-name="a1194" text:class-names=""><text:s text:c="1"/>(</text:span><text:span text:style-name="a1195" text:class-names="">vídeos</text:span><text:span text:style-name="a1196" text:class-names="">)</text:span><text:span text:style-name="a1197" text:class-names=""/></text:p>
          </draw:text-box>
          <svg:title/>
          <svg:desc/>
        </draw:frame>
        <draw:frame draw:id="id154" draw:style-name="a1202" draw:name="TextBox 12" svg:x="0.6in" svg:y="7.1in" svg:width="12in" svg:height="0.3in">
          <draw:text-box>
            <text:p text:style-name="a1201" text:class-names="" text:cond-style-name=""><text:span text:style-name="a1200" text:class-names="">aiBass — TFG</text:span></text:p>
          </draw:text-box>
          <svg:title/>
          <svg:desc/>
        </draw:frame>
        <draw:frame draw:id="id155" draw:style-name="a1203" draw:name="Online Media 13" svg:x="1.07467in" svg:y="0.95599in" svg:width="3.15964in" svg:height="5.61611in" style:rel-width="scale" style:rel-height="scale">
          <draw:plugin xlink:href="https://uses0-my.sharepoint.com/:v:/r/personal/alfespgar_alum_us_es/Documents/TFG/assets/tuner2.mp4?csf=1&amp;web=1&amp;e=RL3R7Z&amp;nav=eyJyZWZlcnJhbEluZm8iOnsicmVmZXJyYWxBcHAiOiJTdHJlYW1XZWJBcHAiLCJyZWZlcnJhbFZpZXciOiJTaGFyZURpYWxvZy1MaW5rIiwicmVmZXJyYWxBcHBQbGF0Zm9ybSI6IldlYiIsInJlZmVycmFsTW9kZSI6InZpZXcifX0%3D" xlink:type="simple" xlink:show="embed" xlink:actuate="onLoad"/>
          <draw:image xlink:href="media/image4.jpeg" xlink:type="simple" xlink:show="embed" xlink:actuate="onLoad"/>
          <office:event-listeners>
            <presentation:event-listener script:event-name="dom:click" presentation:action="none"/>
          </office:event-listeners>
          <svg:title>tuner2.mp4</svg:title>
          <svg:desc/>
        </draw:frame>
        <draw:frame draw:id="id156" draw:style-name="a1204" draw:name="Online Media 14" svg:x="5.14698in" svg:y="1.73315in" svg:width="7.27157in" svg:height="4.07116in" style:rel-width="scale" style:rel-height="scale">
          <draw:plugin xlink:href="https://uses0-my.sharepoint.com/:v:/r/personal/alfespgar_alum_us_es/Documents/TFG/assets/tuner1.mp4?csf=1&amp;web=1&amp;e=L7mdRZ&amp;nav=eyJyZWZlcnJhbEluZm8iOnsicmVmZXJyYWxBcHAiOiJTdHJlYW1XZWJBcHAiLCJyZWZlcnJhbFZpZXciOiJTaGFyZURpYWxvZy1MaW5rIiwicmVmZXJyYWxBcHBQbGF0Zm9ybSI6IldlYiIsInJlZmVycmFsTW9kZSI6InZpZXcifX0%3D" xlink:type="simple" xlink:show="embed" xlink:actuate="onLoad"/>
          <draw:image xlink:href="media/image5.jpeg" xlink:type="simple" xlink:show="embed" xlink:actuate="onLoad"/>
          <office:event-listeners>
            <presentation:event-listener script:event-name="dom:click" presentation:action="none"/>
          </office:event-listeners>
          <svg:title>tuner1.mp4</svg:title>
          <svg:desc/>
        </draw:frame>
        <presentation:notes draw:style-name="a1226">
          <draw:page-thumbnail draw:page-number="8" svg:x="0.75in" svg:y="1.25in" svg:width="6in" svg:height="3.375in" presentation:class="page" draw:id="id157" presentation:style-name="a1205" draw:name="Slide Image Placeholder 1">
            <svg:title/>
            <svg:desc/>
          </draw:page-thumbnail>
          <draw:frame draw:id="id158" presentation:style-name="a1224" draw:name="Notes Placeholder 2" svg:x="0.75in" svg:y="4.8125in" svg:width="6in" svg:height="3.9375in" presentation:class="notes" presentation:placeholder="false">
            <draw:text-box>
              <text:p text:style-name="a1223" text:class-names="" text:cond-style-name=""><text:span text:style-name="a1206" text:class-names="">En<text:s text:c="1"/></text:span><text:span text:style-name="a1207" text:class-names="">los</text:span><text:span text:style-name="a1208" text:class-names=""><text:s text:c="1"/></text:span><text:span text:style-name="a1209" text:class-names="">vídeos</text:span><text:span text:style-name="a1210" text:class-names=""><text:s text:c="1"/></text:span><text:span text:style-name="a1211" text:class-names="">observamos</text:span><text:span text:style-name="a1212" text:class-names=""><text:s text:c="1"/>la<text:s text:c="1"/></text:span><text:span text:style-name="a1213" text:class-names="">detección</text:span><text:span text:style-name="a1214" text:class-names=""><text:s text:c="1"/>de las<text:s text:c="1"/></text:span><text:span text:style-name="a1215" text:class-names="">diferentes</text:span><text:span text:style-name="a1216" text:class-names=""><text:s text:c="1"/></text:span><text:span text:style-name="a1217" text:class-names="">notas</text:span><text:span text:style-name="a1218" text:class-names=""><text:s text:c="1"/></text:span><text:span text:style-name="a1219" text:class-names="">y sus<text:s text:c="1"/></text:span><text:span text:style-name="a1220" text:class-names="">octavas</text:span><text:span text:style-name="a1221" text:class-names="">.</text:span><text:span text:style-name="a1222" text:class-names=""/></text:p>
            </draw:text-box>
            <svg:title/>
            <svg:desc/>
          </draw:frame>
          <draw:frame draw:id="id159" presentation:style-name="a1225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8" draw:style-name="a1227" draw:master-page-name="Master1-Layout7-blank-Blank" presentation:presentation-page-layout-name="Master1-PPL7" draw:id="Slide-263">
        <draw:custom-shape svg:x="0in" svg:y="0in" svg:width="13.333in" svg:height="7.5in" draw:id="id160" draw:style-name="a1230" draw:name="Rectangle 1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161" draw:style-name="a1233" draw:name="Rectangle 2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draw:style-name="a1236" draw:name="TextBox 3" svg:x="0.6in" svg:y="0.35in" svg:width="12.2in" svg:height="0.6in">
          <draw:text-box>
            <text:p text:style-name="a1235" text:class-names="" text:cond-style-name=""><text:span text:style-name="a1234" text:class-names="">Firmware y RTOS</text:span></text:p>
          </draw:text-box>
          <svg:title/>
          <svg:desc/>
        </draw:frame>
        <draw:frame draw:id="id163" draw:style-name="a1280" draw:name="TextBox 4" svg:x="0.9in" svg:y="1.6in" svg:width="10.42835in" svg:height="2.85525in">
          <draw:text-box>
            <text:list text:style-name="a1248">
              <text:list-item>
                <text:p text:style-name="a1247" text:class-names="" text:cond-style-name=""><text:span text:style-name="a1237" text:class-names="">Tareas<text:s text:c="1"/></text:span><text:span text:style-name="a1238" text:class-names="">principales</text:span><text:span text:style-name="a1239" text:class-names="">:<text:s text:c="1"/></text:span><text:span text:style-name="a1240" text:class-names="">adquisición</text:span><text:span text:style-name="a1241" text:class-names=""><text:s text:c="1"/>de<text:s text:c="1"/></text:span><text:span text:style-name="a1242" text:class-names="">ventana</text:span><text:span text:style-name="a1243" text:class-names="">,<text:s text:c="1"/></text:span><text:span text:style-name="a1244" text:class-names="">clasificación</text:span><text:span text:style-name="a1245" text:class-names=""><text:s text:c="1"/>y LED.</text:span><text:span text:style-name="a1246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49" text:class-names="">Sincronización</text:span><text:span text:style-name="a1250" text:class-names=""><text:s text:c="1"/></text:span><text:span text:style-name="a1251" text:class-names="">por</text:span><text:span text:style-name="a1252" text:class-names=""><text:s text:c="1"/>flags y mutex para buffers<text:s text:c="1"/></text:span><text:span text:style-name="a1253" text:class-names="">compartidos</text:span><text:span text:style-name="a1254" text:class-names="">.</text:span><text:span text:style-name="a1255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58" text:class-names="">UART<text:s text:c="1"/></text:span><text:span text:style-name="a1259" text:class-names="">protegido</text:span><text:span text:style-name="a1260" text:class-names=""><text:s text:c="1"/>para<text:s text:c="1"/></text:span><text:span text:style-name="a1261" text:class-names="">evitar</text:span><text:span text:style-name="a1262" text:class-names=""><text:s text:c="1"/></text:span><text:span text:style-name="a1263" text:class-names="">colisiones</text:span><text:span text:style-name="a1264" text:class-names=""><text:s text:c="1"/>entre<text:s text:c="1"/></text:span><text:span text:style-name="a1265" text:class-names="">tareas</text:span><text:span text:style-name="a1266" text:class-names="">.</text:span><text:span text:style-name="a1267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0" text:class-names="">Driver WS2812<text:s text:c="1"/></text:span><text:span text:style-name="a1271" text:class-names="">adaptado</text:span><text:span text:style-name="a1272" text:class-names=""><text:s text:c="1"/>a<text:s text:c="1"/></text:span><text:span text:style-name="a1273" text:class-names="">FreeRTOS</text:span><text:span text:style-name="a1274" text:class-names=""><text:s text:c="1"/>(DMA +<text:s text:c="1"/></text:span><text:span text:style-name="a1275" text:class-names="">semáforos</text:span><text:span text:style-name="a1276" text:class-names="">).</text:span><text:span text:style-name="a1277" text:class-names=""/></text:p>
              </text:list-item>
            </text:list>
          </draw:text-box>
          <svg:title/>
          <svg:desc/>
        </draw:frame>
        <draw:custom-shape svg:x="0.9in" svg:y="5.4in" svg:width="11.5in" svg:height="1.4in" draw:id="id164" draw:style-name="a1283" draw:name="Rectangle 5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style-name="a1288" draw:name="TextBox 6" svg:x="1.2in" svg:y="5.6in" svg:width="10.9in" svg:height="1in">
          <draw:text-box>
            <text:p text:style-name="a1285" text:class-names="" text:cond-style-name=""><text:span text:style-name="a1284" text:class-names="">Nota</text:span></text:p>
            <text:p text:style-name="a1287" text:class-names="" text:cond-style-name=""><text:span text:style-name="a1286" text:class-names="">Se reutilizó y adaptó el driver de IMU/WS2812 del profesor a FreeRTOS</text:span></text:p>
          </draw:text-box>
          <svg:title/>
          <svg:desc/>
        </draw:frame>
        <draw:frame draw:id="id166" draw:style-name="a1291" draw:name="TextBox 7" svg:x="0.6in" svg:y="7.1in" svg:width="12in" svg:height="0.3in">
          <draw:text-box>
            <text:p text:style-name="a1290" text:class-names="" text:cond-style-name=""><text:span text:style-name="a1289" text:class-names="">aiBass — TFG</text:span></text:p>
          </draw:text-box>
          <svg:title/>
          <svg:desc/>
        </draw:frame>
        <presentation:notes draw:style-name="a1297">
          <draw:page-thumbnail draw:page-number="9" svg:x="0.75in" svg:y="1.25in" svg:width="6in" svg:height="3.375in" presentation:class="page" draw:id="id167" presentation:style-name="a1292" draw:name="Slide Image Placeholder 1">
            <svg:title/>
            <svg:desc/>
          </draw:page-thumbnail>
          <draw:frame draw:id="id168" presentation:style-name="a1295" draw:name="Notes Placeholder 2" svg:x="0.75in" svg:y="4.8125in" svg:width="6in" svg:height="3.9375in" presentation:class="notes" presentation:placeholder="false">
            <draw:text-box>
              <text:p text:style-name="a1294" text:class-names="" text:cond-style-name=""><text:span text:style-name="a1293" text:class-names="">El firmware se estructura en tareas: adquisición de ventana de datos, clasificación y actualización LED. La sincronización por flags y mutex evita bloqueos. El driver de WS2812 e IMU se adaptó para FreeRTOS usando DMA y semáforos.</text:span></text:p>
            </draw:text-box>
            <svg:title/>
            <svg:desc/>
          </draw:frame>
          <draw:frame draw:id="id169" presentation:style-name="a1296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9" draw:style-name="a1298" draw:master-page-name="Master1-Layout7-blank-Blank" presentation:presentation-page-layout-name="Master1-PPL7" draw:id="Slide-264">
        <draw:custom-shape svg:x="0in" svg:y="0in" svg:width="13.333in" svg:height="7.5in" draw:id="id170" draw:style-name="a1301" draw:name="Rectangle 1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171" draw:style-name="a1304" draw:name="Rectangle 2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1307" draw:name="TextBox 3" svg:x="0.6in" svg:y="0.35in" svg:width="12.2in" svg:height="0.6in">
          <draw:text-box>
            <text:p text:style-name="a1306" text:class-names="" text:cond-style-name=""><text:span text:style-name="a1305" text:class-names="">IA embebida</text:span></text:p>
          </draw:text-box>
          <svg:title/>
          <svg:desc/>
        </draw:frame>
        <draw:custom-shape svg:x="0.9in" svg:y="1.6in" svg:width="3.04719in" svg:height="2.13745in" draw:id="id173" draw:style-name="a1310" draw:name="Rectangle 4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1334" draw:name="TextBox 5" svg:x="1.2in" svg:y="1.8in" svg:width="2.44938in" svg:height="1.75026in">
          <draw:text-box>
            <text:p text:style-name="a1312" text:class-names="" text:cond-style-name=""><text:span text:style-name="a1311" text:class-names="">Dataset</text:span></text:p>
            <text:list text:style-name="a1317">
              <text:list-item>
                <text:p text:style-name="a1316" text:class-names="" text:cond-style-name=""><text:span text:style-name="a1313" text:class-names="">E: 100<text:s text:c="1"/></text:span><text:span text:style-name="a1314" text:class-names="">ventanas</text:span><text:span text:style-name="a1315" text:class-names=""/></text:p>
              </text:list-item>
            </text:list>
            <text:list text:style-name="a1321">
              <text:list-item>
                <text:p text:style-name="a1320" text:class-names="" text:cond-style-name=""><text:span text:style-name="a1318" text:class-names="">A: 100<text:s text:c="1"/></text:span><text:span text:style-name="a1319" text:class-names="">ventanas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2" text:class-names="">D: 100<text:s text:c="1"/></text:span><text:span text:style-name="a1323" text:class-names="">ventanas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6" text:class-names="">G: 100<text:s text:c="1"/></text:span><text:span text:style-name="a1327" text:class-names="">ventanas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0" text:class-names="">RUIDO: 150<text:s text:c="1"/></text:span><text:span text:style-name="a1331" text:class-names="">ventanas</text:span></text:p>
              </text:list-item>
            </text:list>
          </draw:text-box>
          <svg:title/>
          <svg:desc/>
        </draw:frame>
        <draw:custom-shape svg:x="4.88689in" svg:y="1.6in" svg:width="7.51311in" svg:height="2.12809in" draw:id="id175" draw:style-name="a1337" draw:name="Rectangle 6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1354" draw:name="TextBox 7" svg:x="5.3367in" svg:y="1.8in" svg:width="1.26543in" svg:height="1.48099in">
          <draw:text-box>
            <text:p text:style-name="a1339" text:class-names="" text:cond-style-name=""><text:span text:style-name="a1338" text:class-names="">Pipeline</text:span></text:p>
            <text:list text:style-name="a1343">
              <text:list-item>
                <text:p text:style-name="a1342" text:class-names="" text:cond-style-name=""><text:span text:style-name="a1340" text:class-names="">Detrend</text:span><text:span text:style-name="a1341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STFT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PCA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0" text:class-names="">SVM</text:span><text:span text:style-name="a1351" text:class-names=""/></text:p>
              </text:list-item>
            </text:list>
          </draw:text-box>
          <svg:title/>
          <svg:desc/>
        </draw:frame>
        <draw:custom-shape svg:x="0.9in" svg:y="4.1in" svg:width="11.5in" svg:height="2.3in" draw:id="id177" draw:style-name="a1357" draw:name="Rectangle 8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draw:style-name="a1404" draw:name="TextBox 9" svg:x="1.2in" svg:y="4.3in" svg:width="6.60878in" svg:height="2.01953in">
          <draw:text-box>
            <text:p text:style-name="a1360" text:class-names="" text:cond-style-name=""><text:span text:style-name="a1358" text:class-names="">Rendimiento</text:span><text:span text:style-name="a1359" text:class-names=""/></text:p>
            <text:p text:style-name="a1369" text:class-names="" text:cond-style-name=""><text:span text:style-name="a1361" text:class-names="">• Tipo de<text:s text:c="1"/></text:span><text:span text:style-name="a1362" text:class-names="">modelo</text:span><text:span text:style-name="a1363" text:class-names="">:<text:s text:c="1"/></text:span><text:span text:style-name="a1364" text:class-names="">Clasificación</text:span><text:span text:style-name="a1365" text:class-names=""><text:s text:c="1"/></text:span><text:span text:style-name="a1366" text:class-names="">multiclase</text:span><text:span text:style-name="a1367" text:class-names="">.</text:span><text:span text:style-name="a1368" text:class-names=""/></text:p>
            <text:p text:style-name="a1378" text:class-names="" text:cond-style-name=""><text:span text:style-name="a1370" text:class-names="">•<text:s text:c="1"/></text:span><text:span text:style-name="a1371" text:class-names="">Clases</text:span><text:span text:style-name="a1372" text:class-names="">: E, A, D, G y<text:s text:c="1"/></text:span><text:span text:style-name="a1373" text:class-names="">ruido</text:span><text:span text:style-name="a1374" text:class-names="">/</text:span><text:span text:style-name="a1375" text:class-names="">silencio</text:span><text:span text:style-name="a1376" text:class-names="">.</text:span><text:span text:style-name="a1377" text:class-names=""/></text:p>
            <text:p text:style-name="a1392" text:class-names="" text:cond-style-name=""><text:span text:style-name="a1379" text:class-names="">•<text:s text:c="1"/></text:span><text:span text:style-name="a1380" text:class-names="">Precisión</text:span><text:span text:style-name="a1381" text:class-names=""><text:s text:c="1"/></text:span><text:span text:style-name="a1382" text:class-names="">balanceada</text:span><text:span text:style-name="a1383" text:class-names="">: 97.48% (</text:span><text:span text:style-name="a1384" text:class-names="">en</text:span><text:span text:style-name="a1385" text:class-names=""><text:s text:c="1"/></text:span><text:span text:style-name="a1386" text:class-names="">entorno</text:span><text:span text:style-name="a1387" text:class-names=""><text:s text:c="1"/></text:span><text:span text:style-name="a1388" text:class-names="">controlado</text:span><text:span text:style-name="a1389" text:class-names=""><text:s text:c="1"/>de<text:s text:c="1"/></text:span><text:span text:style-name="a1390" text:class-names="">validación</text:span><text:span text:style-name="a1391" text:class-names="">).</text:span></text:p>
            <text:p text:style-name="a1397" text:class-names="" text:cond-style-name=""><text:span text:style-name="a1393" text:class-names="">•<text:s text:c="1"/></text:span><text:span text:style-name="a1394" text:class-names="">Latencia</text:span><text:span text:style-name="a1395" text:class-names="">: 0.4ms</text:span><text:span text:style-name="a1396" text:class-names=""/></text:p>
            <text:p text:style-name="a1400" text:class-names="" text:cond-style-name=""><text:span text:style-name="a1398" text:class-names="">• Memoria Flash: 2.10 KB</text:span><text:span text:style-name="a1399" text:class-names=""/></text:p>
            <text:p text:style-name="a1403" text:class-names="" text:cond-style-name=""><text:span text:style-name="a1401" text:class-names="">• Memoria RAM: 2.30 KB</text:span><text:span text:style-name="a1402" text:class-names=""/></text:p>
          </draw:text-box>
          <svg:title/>
          <svg:desc/>
        </draw:frame>
        <draw:frame draw:id="id179" draw:style-name="a1407" draw:name="TextBox 10" svg:x="0.6in" svg:y="7.1in" svg:width="12in" svg:height="0.3in">
          <draw:text-box>
            <text:p text:style-name="a1406" text:class-names="" text:cond-style-name=""><text:span text:style-name="a1405" text:class-names="">aiBass — TFG</text:span></text:p>
          </draw:text-box>
          <svg:title/>
          <svg:desc/>
        </draw:frame>
        <draw:frame draw:id="id180" draw:style-name="a1408" draw:name="Picture 11" svg:x="7.05056in" svg:y="1.5985in" svg:width="5.34644in" svg:height="2.13071in" style:rel-width="scale" style:rel-height="scale">
          <draw:image xlink:href="media/image6.png" xlink:type="simple" xlink:show="embed" xlink:actuate="onLoad"/>
          <svg:title/>
          <svg:desc>A diagram of a software development

AI-generated content may be incorrect.</svg:desc>
        </draw:frame>
        <draw:frame draw:id="id181" draw:style-name="a1412" draw:name="TextBox 12" svg:x="5.96992in" svg:y="5.74361in" svg:width="3.45211in" svg:height="0.37025in">
          <draw:text-box>
            <text:p text:style-name="a1411" text:class-names="" text:cond-style-name=""><text:span text:style-name="a1409" text:class-names="">¡MUY LIGERO!</text:span><text:span text:style-name="a1410" text:class-names=""/></text:p>
          </draw:text-box>
          <svg:title/>
          <svg:desc/>
        </draw:frame>
        <draw:connector draw:type="line" svg:x1="5.98584in" svg:y1="5.89688in" svg:x2="3.94277in" svg:y2="5.86692in" draw:id="id182" draw:style-name="a1414" draw:name="Straight Arrow Connector 13">
          <svg:title/>
          <svg:desc/>
        </draw:connector>
        <presentation:notes draw:style-name="a1420">
          <draw:page-thumbnail draw:page-number="10" svg:x="0.75in" svg:y="1.25in" svg:width="6in" svg:height="3.375in" presentation:class="page" draw:id="id183" presentation:style-name="a1415" draw:name="Slide Image Placeholder 1">
            <svg:title/>
            <svg:desc/>
          </draw:page-thumbnail>
          <draw:frame draw:id="id184" presentation:style-name="a1418" draw:name="Notes Placeholder 2" svg:x="0.75in" svg:y="4.8125in" svg:width="6in" svg:height="3.9375in" presentation:class="notes" presentation:placeholder="false">
            <draw:text-box>
              <text:p text:style-name="a1417" text:class-names="" text:cond-style-name=""><text:span text:style-name="a1416" text:class-names="">Aquí detallo dataset, pipeline de preprocesado y modelo. He dejado marcadores para valores numéricos concretos que están en la memoria. La idea es resaltar que el modelo es ligero y apto para MCU.</text:span></text:p>
            </draw:text-box>
            <svg:title/>
            <svg:desc/>
          </draw:frame>
          <draw:frame draw:id="id185" presentation:style-name="a1419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10" draw:style-name="a1421" draw:master-page-name="Master1-Layout7-blank-Blank" presentation:presentation-page-layout-name="Master1-PPL7" draw:id="Slide-265">
        <draw:custom-shape svg:x="0in" svg:y="0in" svg:width="13.333in" svg:height="7.5in" draw:id="id186" draw:style-name="a1424" draw:name="Rectangle 1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187" draw:style-name="a1427" draw:name="Rectangle 2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430" draw:name="TextBox 3" svg:x="0.6in" svg:y="0.35in" svg:width="12.2in" svg:height="0.6in">
          <draw:text-box>
            <text:p text:style-name="a1429" text:class-names="" text:cond-style-name=""><text:span text:style-name="a1428" text:class-names="">Interfaz autónoma</text:span></text:p>
          </draw:text-box>
          <svg:title/>
          <svg:desc/>
        </draw:frame>
        <draw:custom-shape svg:x="0.9in" svg:y="1.6in" svg:width="6.2in" svg:height="2.2in" draw:id="id189" draw:style-name="a1433" draw:name="Rectangle 4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453" draw:name="TextBox 5" svg:x="1.2in" svg:y="1.8in" svg:width="1.9161in" svg:height="1.75026in">
          <draw:text-box>
            <text:p text:style-name="a1435" text:class-names="" text:cond-style-name=""><text:span text:style-name="a1434" text:class-names="">UART</text:span></text:p>
            <text:p text:style-name="a1439" text:class-names="" text:cond-style-name=""><text:span text:style-name="a1436" text:class-names="">Logging </text:span><text:span text:style-name="a1437" text:class-names="">básico</text:span><text:span text:style-name="a1438" text:class-names=""/></text:p>
            <text:p text:style-name="a1441" text:class-names="" text:cond-style-name=""><text:span text:style-name="a1440" text:class-names=""/></text:p>
            <text:p text:style-name="a1445" text:class-names="" text:cond-style-name=""><text:span text:style-name="a1442" text:class-names="">Con<text:s text:c="1"/></text:span><text:span text:style-name="a1443" text:class-names="">posibilidad</text:span><text:span text:style-name="a1444" text:class-names=""/></text:p>
            <text:p text:style-name="a1449" text:class-names="" text:cond-style-name=""><text:span text:style-name="a1446" text:class-names="">de<text:s text:c="1"/></text:span><text:span text:style-name="a1447" text:class-names="">ampliación</text:span><text:span text:style-name="a1448" text:class-names=""/></text:p>
            <text:p text:style-name="a1452" text:class-names="" text:cond-style-name=""><text:span text:style-name="a1450" text:class-names="">gracias a<text:s text:c="1"/></text:span><text:span text:style-name="a1451" text:class-names="">FreeRTOS</text:span></text:p>
          </draw:text-box>
          <svg:title/>
          <svg:desc/>
        </draw:frame>
        <draw:custom-shape svg:x="7.3in" svg:y="1.6in" svg:width="5.1in" svg:height="5.32734in" draw:id="id191" draw:style-name="a1456" draw:name="Rectangle 6">
          <svg:title/>
          <svg:desc/>
          <text:p text:style-name="a1455" text:class-names="" text:cond-style-name=""><text:span text:style-name="a1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2" draw:style-name="a1466" draw:name="TextBox 7" svg:x="7.6in" svg:y="1.8in" svg:width="3.56342in" svg:height="0.94245in">
          <draw:text-box>
            <text:p text:style-name="a1458" text:class-names="" text:cond-style-name=""><text:span text:style-name="a1457" text:class-names="">WS2812</text:span></text:p>
            <text:p text:style-name="a1463" text:class-names="" text:cond-style-name=""><text:span text:style-name="a1459" text:class-names="">Feedback local de nota y<text:s text:c="1"/></text:span><text:span text:style-name="a1460" text:class-names="">ruido</text:span><text:span text:style-name="a1461" text:class-names=""><text:s text:c="1"/>sin PC</text:span><text:span text:style-name="a1462" text:class-names=""/></text:p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193" draw:style-name="a1471" draw:name="TextBox 8" svg:x="0.9in" svg:y="4.6in" svg:width="6.20075in" svg:height="0.84147in">
          <draw:text-box>
            <text:p text:style-name="a1468" text:class-names="" text:cond-style-name=""><text:span text:style-name="a1467" text:class-names="">Código de color por nota (E/A/D/G).</text:span></text:p>
            <text:p text:style-name="a1470" text:class-names="" text:cond-style-name=""><text:span text:style-name="a1469" text:class-names="">Rojo para ruido/silencio.</text:span></text:p>
          </draw:text-box>
          <svg:title/>
          <svg:desc/>
        </draw:frame>
        <draw:frame draw:id="id194" draw:style-name="a1474" draw:name="TextBox 9" svg:x="0.6in" svg:y="7.1in" svg:width="12in" svg:height="0.3in">
          <draw:text-box>
            <text:p text:style-name="a1473" text:class-names="" text:cond-style-name=""><text:span text:style-name="a1472" text:class-names="">aiBass — TFG</text:span></text:p>
          </draw:text-box>
          <svg:title/>
          <svg:desc/>
        </draw:frame>
        <draw:frame draw:id="id195" draw:style-name="a1475" draw:name="Picture 12" svg:x="3.25726in" svg:y="1.89917in" svg:width="3.54167in" svg:height="1.69792in" style:rel-width="scale" style:rel-height="scale">
          <draw:image xlink:href="media/image7.png" xlink:type="simple" xlink:show="embed" xlink:actuate="onLoad"/>
          <svg:title/>
          <svg:desc>A screen shot of a computer

AI-generated content may be incorrect.</svg:desc>
        </draw:frame>
        <draw:frame draw:id="id196" draw:style-name="a1476" draw:name="Picture 13" svg:x="7.43539in" svg:y="2.86587in" svg:width="2.27341in" svg:height="2.0398in" style:rel-width="scale" style:rel-height="scale">
          <draw:image xlink:href="media/image8.png" xlink:type="simple" xlink:show="embed" xlink:actuate="onLoad"/>
          <svg:title/>
          <svg:desc>A circuit board with red lights

AI-generated content may be incorrect.</svg:desc>
        </draw:frame>
        <draw:frame draw:id="id197" draw:style-name="a1477" draw:name="Picture 14" svg:x="10.0103in" svg:y="2.86587in" svg:width="2.24532in" svg:height="2.03979in" style:rel-width="scale" style:rel-height="scale">
          <draw:image xlink:href="media/image9.png" xlink:type="simple" xlink:show="embed" xlink:actuate="onLoad"/>
          <svg:title/>
          <svg:desc>A close up of a circuit board

AI-generated content may be incorrect.</svg:desc>
        </draw:frame>
        <draw:frame draw:id="id198" draw:style-name="a1481" draw:name="TextBox 15" svg:x="8.0792in" svg:y="5.02481in" svg:width="0.99449in" svg:height="0.37025in">
          <draw:text-box>
            <text:p text:style-name="a1480" text:class-names="" text:cond-style-name=""><text:span text:style-name="a1478" text:class-names="">NOISE</text:span><text:span text:style-name="a1479" text:class-names=""/></text:p>
          </draw:text-box>
          <svg:title/>
          <svg:desc/>
        </draw:frame>
        <draw:frame draw:id="id199" draw:style-name="a1485" draw:name="TextBox 16" svg:x="10.33526in" svg:y="5.02247in" svg:width="1.643in" svg:height="0.37025in">
          <draw:text-box>
            <text:p text:style-name="a1484" text:class-names="" text:cond-style-name=""><text:span text:style-name="a1482" text:class-names="">NOTA VÁLIDA</text:span><text:span text:style-name="a1483" text:class-names=""/></text:p>
          </draw:text-box>
          <svg:title/>
          <svg:desc/>
        </draw:frame>
        <presentation:notes draw:style-name="a1491">
          <draw:page-thumbnail draw:page-number="11" svg:x="0.75in" svg:y="1.25in" svg:width="6in" svg:height="3.375in" presentation:class="page" draw:id="id200" presentation:style-name="a1486" draw:name="Slide Image Placeholder 1">
            <svg:title/>
            <svg:desc/>
          </draw:page-thumbnail>
          <draw:frame draw:id="id201" presentation:style-name="a1489" draw:name="Notes Placeholder 2" svg:x="0.75in" svg:y="4.8125in" svg:width="6in" svg:height="3.9375in" presentation:class="notes" presentation:placeholder="false">
            <draw:text-box>
              <text:p text:style-name="a1488" text:class-names="" text:cond-style-name=""><text:span text:style-name="a1487" text:class-names="">Se añadió una tira WS2812 para que el sistema sea autónomo: cada nota tiene un color y el ruido se marca en rojo. UART se mantiene para trazabilidad técnica durante pruebas.</text:span></text:p>
            </draw:text-box>
            <svg:title/>
            <svg:desc/>
          </draw:frame>
          <draw:frame draw:id="id202" presentation:style-name="a1490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12" draw:style-name="a1492" draw:master-page-name="Master1-Layout7-blank-Blank" presentation:presentation-page-layout-name="Master1-PPL7" draw:id="Slide-267">
        <draw:custom-shape svg:x="0in" svg:y="0in" svg:width="13.333in" svg:height="7.5in" draw:id="id203" draw:style-name="a1495" draw:name="Rectangle 1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204" draw:style-name="a1498" draw:name="Rectangle 2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draw:style-name="a1501" draw:name="TextBox 3" svg:x="0.6in" svg:y="0.35in" svg:width="12.2in" svg:height="0.6in">
          <draw:text-box>
            <text:p text:style-name="a1500" text:class-names="" text:cond-style-name=""><text:span text:style-name="a1499" text:class-names="">Planificación y costes</text:span></text:p>
          </draw:text-box>
          <svg:title/>
          <svg:desc/>
        </draw:frame>
        <draw:custom-shape svg:x="0.9in" svg:y="1.6in" svg:width="5.7in" svg:height="2.4in" draw:id="id206" draw:style-name="a1504" draw:name="Rectangle 4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1509" draw:name="TextBox 5" svg:x="1.2in" svg:y="1.8in" svg:width="5.1in" svg:height="2in">
          <draw:text-box>
            <text:p text:style-name="a1506" text:class-names="" text:cond-style-name=""><text:span text:style-name="a1505" text:class-names="">Dedicación</text:span></text:p>
            <text:p text:style-name="a1508" text:class-names="" text:cond-style-name=""><text:span text:style-name="a1507" text:class-names="">≈300 h totales · ~100 h explorando Rust + Embassy</text:span></text:p>
          </draw:text-box>
          <svg:title/>
          <svg:desc/>
        </draw:frame>
        <draw:custom-shape svg:x="6.8in" svg:y="1.6in" svg:width="5.6in" svg:height="2.4in" draw:id="id208" draw:style-name="a1512" draw:name="Rectangle 6">
          <svg:title/>
          <svg:desc/>
          <text:p text:style-name="a1511" text:class-names="" text:cond-style-name=""><text:span text:style-name="a1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1529" draw:name="TextBox 7" svg:x="7.1in" svg:y="1.8in" svg:width="3.42949in" svg:height="1.21172in">
          <draw:text-box>
            <text:p text:style-name="a1514" text:class-names="" text:cond-style-name=""><text:span text:style-name="a1513" text:class-names="">Costes</text:span></text:p>
            <text:list text:style-name="a1518">
              <text:list-item>
                <text:p text:style-name="a1517" text:class-names="" text:cond-style-name=""><text:span text:style-name="a1515" text:class-names="">Coste personal: 4200</text:span><text:span text:style-name="a1516" text:class-names="">€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19" text:class-names="">Coste material: 60</text:span><text:span text:style-name="a1520" text:class-names="">€</text:span><text:span text:style-name="a1521" text:class-names=""/></text:p>
              </text:list-item>
            </text:list>
            <text:list text:style-name="a1528">
              <text:list-item>
                <text:p text:style-name="a1527" text:class-names="" text:cond-style-name=""><text:span text:style-name="a1524" text:class-names="">Coste total del<text:s text:c="1"/></text:span><text:span text:style-name="a1525" text:class-names="">prototipo</text:span><text:span text:style-name="a1526" text:class-names="">: 4260€</text:span></text:p>
              </text:list-item>
            </text:list>
          </draw:text-box>
          <svg:title/>
          <svg:desc/>
        </draw:frame>
        <draw:custom-shape svg:x="0.9in" svg:y="4.4in" svg:width="11.5in" svg:height="2.6in" draw:id="id210" draw:style-name="a1532" draw:name="Rectangle 8">
          <svg:title/>
          <svg:desc/>
          <text:p text:style-name="a1531" text:class-names="" text:cond-style-name=""><text:span text:style-name="a1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draw:style-name="a1537" draw:name="TextBox 9" svg:x="1.2in" svg:y="4.6in" svg:width="10.9in" svg:height="2.2in">
          <draw:text-box>
            <text:p text:style-name="a1534" text:class-names="" text:cond-style-name=""><text:span text:style-name="a1533" text:class-names="">Lección</text:span></text:p>
            <text:p text:style-name="a1536" text:class-names="" text:cond-style-name=""><text:span text:style-name="a1535" text:class-names="">Explorar Rust + Embassy fue valioso, pero se priorizó la viabilidad con C/FreeRTOS</text:span></text:p>
          </draw:text-box>
          <svg:title/>
          <svg:desc/>
        </draw:frame>
        <draw:frame draw:id="id212" draw:style-name="a1540" draw:name="TextBox 10" svg:x="0.6in" svg:y="7.1in" svg:width="12in" svg:height="0.3in">
          <draw:text-box>
            <text:p text:style-name="a1539" text:class-names="" text:cond-style-name=""><text:span text:style-name="a1538" text:class-names="">aiBass — TFG</text:span></text:p>
          </draw:text-box>
          <svg:title/>
          <svg:desc/>
        </draw:frame>
        <draw:frame draw:id="id213" draw:style-name="a1541" draw:name="Picture 11" svg:x="2.57257in" svg:y="2.51791in" svg:width="2.35487in" svg:height="1.3780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547">
          <draw:page-thumbnail draw:page-number="12" svg:x="0.75in" svg:y="1.25in" svg:width="6in" svg:height="3.375in" presentation:class="page" draw:id="id214" presentation:style-name="a1542" draw:name="Slide Image Placeholder 1">
            <svg:title/>
            <svg:desc/>
          </draw:page-thumbnail>
          <draw:frame draw:id="id215" presentation:style-name="a1545" draw:name="Notes Placeholder 2" svg:x="0.75in" svg:y="4.8125in" svg:width="6in" svg:height="3.9375in" presentation:class="notes" presentation:placeholder="false">
            <draw:text-box>
              <text:p text:style-name="a1544" text:class-names="" text:cond-style-name=""><text:span text:style-name="a1543" text:class-names="">La planificación incluye una fase importante de investigación en Rust+Embassy (~100h) que se descartó por viabilidad. Los costes se completan con las cifras de la memoria.</text:span></text:p>
            </draw:text-box>
            <svg:title/>
            <svg:desc/>
          </draw:frame>
          <draw:frame draw:id="id216" presentation:style-name="a1546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draw:page draw:name="Slide13" draw:style-name="a1548" draw:master-page-name="Master1-Layout7-blank-Blank" presentation:presentation-page-layout-name="Master1-PPL7" draw:id="Slide-268">
        <draw:custom-shape svg:x="0in" svg:y="0in" svg:width="13.333in" svg:height="7.5in" draw:id="id217" draw:style-name="a1551" draw:name="Rectangle 1">
          <svg:title/>
          <svg:desc/>
          <text:p text:style-name="a1550" text:class-names="" text:cond-style-name=""><text:span text:style-name="a1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in" svg:height="0.18in" draw:id="id218" draw:style-name="a1554" draw:name="Rectangle 2">
          <svg:title/>
          <svg:desc/>
          <text:p text:style-name="a1553" text:class-names="" text:cond-style-name=""><text:span text:style-name="a1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9" draw:style-name="a1557" draw:name="TextBox 3" svg:x="0.6in" svg:y="0.35in" svg:width="12.2in" svg:height="0.6in">
          <draw:text-box>
            <text:p text:style-name="a1556" text:class-names="" text:cond-style-name=""><text:span text:style-name="a1555" text:class-names="">Trabajo futuro y cierre</text:span></text:p>
          </draw:text-box>
          <svg:title/>
          <svg:desc/>
        </draw:frame>
        <draw:frame draw:id="id220" draw:style-name="a1604" draw:name="TextBox 4" svg:x="0.9in" svg:y="1.6in" svg:width="8.16508in" svg:height="2.82047in">
          <draw:text-box>
            <text:list text:style-name="a1569">
              <text:list-item>
                <text:p text:style-name="a1568" text:class-names="" text:cond-style-name=""><text:span text:style-name="a1558" text:class-names="">Mejorar<text:s text:c="1"/></text:span><text:span text:style-name="a1559" text:class-names="">resolución</text:span><text:span text:style-name="a1560" text:class-names=""><text:s text:c="1"/>musical y<text:s text:c="1"/></text:span><text:span text:style-name="a1561" text:class-names="">robustez</text:span><text:span text:style-name="a1562" text:class-names=""><text:s text:c="1"/></text:span><text:span text:style-name="a1563" text:class-names="">en</text:span><text:span text:style-name="a1564" text:class-names=""><text:s text:c="1"/></text:span><text:span text:style-name="a1565" text:class-names="">condiciones</text:span><text:span text:style-name="a1566" text:class-names=""><text:s text:c="1"/>reales.</text:span><text:span text:style-name="a1567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70" text:class-names="">Optimizar</text:span><text:span text:style-name="a1571" text:class-names=""><text:s text:c="1"/></text:span><text:span text:style-name="a1572" text:class-names="">montaje</text:span><text:span text:style-name="a1573" text:class-names=""><text:s text:c="1"/>y<text:s text:c="1"/></text:span><text:span text:style-name="a1574" text:class-names="">aislamiento</text:span><text:span text:style-name="a1575" text:class-names=""><text:s text:c="1"/>del sensor.</text:span><text:span text:style-name="a1576" text:class-names=""/></text:p>
              </text:list-item>
            </text:list>
            <text:list text:style-name="a1590">
              <text:list-item>
                <text:p text:style-name="a1589" text:class-names="" text:cond-style-name=""><text:span text:style-name="a1579" text:class-names="">Placa<text:s text:c="1"/></text:span><text:span text:style-name="a1580" text:class-names="">propia</text:span><text:span text:style-name="a1581" text:class-names=""><text:s text:c="1"/>y<text:s text:c="1"/></text:span><text:span text:style-name="a1582" text:class-names="">carcasa</text:span><text:span text:style-name="a1583" text:class-names=""><text:s text:c="1"/>3D para<text:s text:c="1"/></text:span><text:span text:style-name="a1584" text:class-names="">reducir</text:span><text:span text:style-name="a1585" text:class-names=""><text:s text:c="1"/></text:span><text:span text:style-name="a1586" text:class-names="">componentes</text:span><text:span text:style-name="a1587" text:class-names=""><text:s text:c="1"/>del kit.</text:span><text:span text:style-name="a1588" text:class-names=""/></text:p>
              </text:list-item>
            </text:list>
            <text:list text:style-name="a1597">
              <text:list-item>
                <text:p text:style-name="a1596" text:class-names="" text:cond-style-name=""><text:span text:style-name="a1591" text:class-names="">Salida MIDI/DAW y<text:s text:c="1"/></text:span><text:span text:style-name="a1592" text:class-names="">ampliación</text:span><text:span text:style-name="a1593" text:class-names=""><text:s text:c="1"/>de<text:s text:c="1"/></text:span><text:span text:style-name="a1594" text:class-names="">clases</text:span><text:span text:style-name="a1595" text:class-names="">.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598" text:class-names="">Crecimiento</text:span><text:span text:style-name="a1599" text:class-names=""><text:s text:c="1"/>y<text:s text:c="1"/></text:span><text:span text:style-name="a1600" text:class-names="">poda</text:span><text:span text:style-name="a1601" text:class-names=""><text:s text:c="1"/>del dataset.</text:span></text:p>
              </text:list-item>
            </text:list>
          </draw:text-box>
          <svg:title/>
          <svg:desc/>
        </draw:frame>
        <draw:custom-shape svg:x="0.9in" svg:y="6.1in" svg:width="11.5in" svg:height="1in" draw:id="id221" draw:style-name="a1607" draw:name="Rectangle 5">
          <svg:title/>
          <svg:desc/>
          <text:p text:style-name="a1606" text:class-names="" text:cond-style-name=""><text:span text:style-name="a1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draw:style-name="a1612" draw:name="TextBox 6" svg:x="1.2in" svg:y="6.3in" svg:width="10.9in" svg:height="0.6in">
          <draw:text-box>
            <text:p text:style-name="a1609" text:class-names="" text:cond-style-name=""><text:span text:style-name="a1608" text:class-names="">Conclusión</text:span></text:p>
            <text:p text:style-name="a1611" text:class-names="" text:cond-style-name=""><text:span text:style-name="a1610" text:class-names="">Prototipo funcional de IA embebida con base escalable</text:span></text:p>
          </draw:text-box>
          <svg:title/>
          <svg:desc/>
        </draw:frame>
        <draw:frame draw:id="id223" draw:style-name="a1615" draw:name="TextBox 7" svg:x="0.6in" svg:y="7.1in" svg:width="12in" svg:height="0.3in">
          <draw:text-box>
            <text:p text:style-name="a1614" text:class-names="" text:cond-style-name=""><text:span text:style-name="a1613" text:class-names="">aiBass — TFG</text:span></text:p>
          </draw:text-box>
          <svg:title/>
          <svg:desc/>
        </draw:frame>
        <presentation:notes draw:style-name="a1621">
          <draw:page-thumbnail draw:page-number="13" svg:x="0.75in" svg:y="1.25in" svg:width="6in" svg:height="3.375in" presentation:class="page" draw:id="id224" presentation:style-name="a1616" draw:name="Slide Image Placeholder 1">
            <svg:title/>
            <svg:desc/>
          </draw:page-thumbnail>
          <draw:frame draw:id="id225" presentation:style-name="a1619" draw:name="Notes Placeholder 2" svg:x="0.75in" svg:y="4.8125in" svg:width="6in" svg:height="3.9375in" presentation:class="notes" presentation:placeholder="false">
            <draw:text-box>
              <text:p text:style-name="a1618" text:class-names="" text:cond-style-name=""><text:span text:style-name="a1617" text:class-names="">Cierro con líneas de trabajo futuro: robustez, resolución musical y una placa propia con carcasa 3D. La conclusión es que el prototipo ya valida la idea y deja una base sólida para evolución.</text:span></text:p>
            </draw:text-box>
            <svg:title/>
            <svg:desc/>
          </draw:frame>
          <draw:frame draw:id="id226" presentation:style-name="a1620" draw:name="Slide Number Placeholder 3" svg:x="4.24826in" svg:y="9.49826in" svg:width="3.25in" svg:height="0.50174in" presentation:class="page-number" presentation:placeholder="true"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41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2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9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2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5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27/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3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8" draw:name="Title 1" svg:x="0.75in" svg:y="2.32986in" svg:width="8.5in" svg:height="1.60764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1.5in" svg:y="4.25in" svg:width="7in" svg:height="1.91667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7" draw:name="Date Placeholder 3" svg:x="0.5in" svg:y="6.95139in" svg:width="2.3333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1/27/13</text:date></text:span><text:span text:style-name="a75" text:class-names=""/></text:p>
        </draw:text-box>
        <svg:title/>
        <svg:desc/>
      </draw:frame>
      <draw:frame draw:id="id14" presentation:style-name="a80" draw:name="Footer Placeholder 4" svg:x="3.41667in" svg:y="6.95139in" svg:width="3.16667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4" draw:name="Slide Number Placeholder 5" svg:x="7.16667in" svg:y="6.95139in" svg:width="2.33333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#›</text:page-number></text:span><text:span text:style-name="a82" text:class-names=""/></text:p>
        </draw:text-box>
        <svg:title/>
        <svg:desc/>
      </draw:frame>
      <presentation:notes style:page-layout-name="pageLayout2" draw:style-name="a114">
        <draw:frame draw:id="id5" presentation:style-name="a87" draw:name="Header Placeholder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7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" draw:name="Footer Placeholder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5in" svg:y="0.30035in" svg:width="9in" svg:height="1.2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5in" svg:y="1.75in" svg:width="9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1" draw:name="Date Placeholder 3" svg:x="0.5in" svg:y="6.95139in" svg:width="2.33333in" svg:height="0.39931in" presentation:class="date-time" presentation:placeholder="false">
        <draw:text-box>
          <text:p text:style-name="a140" text:class-names="" text:cond-style-name=""><text:span text:style-name="a137" text:class-names=""><text:date text:fixed="false" style:data-style-name="a138">1/27/13</text:date></text:span><text:span text:style-name="a139" text:class-names=""/></text:p>
        </draw:text-box>
        <svg:title/>
        <svg:desc/>
      </draw:frame>
      <draw:frame draw:id="id19" presentation:style-name="a144" draw:name="Footer Placeholder 4" svg:x="3.41667in" svg:y="6.95139in" svg:width="3.16667in" svg:height="0.39931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0" presentation:style-name="a148" draw:name="Slide Number Placeholder 5" svg:x="7.16667in" svg:y="6.95139in" svg:width="2.33333in" svg:height="0.39931in" presentation:class="page-number" presentation:placeholder="false">
        <draw:text-box>
          <text:p text:style-name="a147" text:class-names="" text:cond-style-name=""><text:span text:style-name="a145" text:class-names=""><text:page-number style:num-format="1" text:fixed="false">‹#›</text:page-number></text:span><text:span text:style-name="a146" text:class-names=""/></text:p>
        </draw:text-box>
        <svg:title/>
        <svg:desc/>
      </draw:frame>
      <presentation:notes style:page-layout-name="pageLayout2" draw:style-name="a178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e Placehold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6" draw:name="Slide Image Placeholder 3">
          <svg:title/>
          <svg:desc/>
        </draw:page-thumbnail>
        <draw:frame draw:id="id8" presentation:style-name="a171" draw:name="Notes Placehold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Click to edit Master text styles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 level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ooter Placehold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Slide Number Placehold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1" presentation:style-name="a183" draw:name="Title 1" svg:x="0.78993in" svg:y="4.81944in" svg:width="8.5in" svg:height="1.48958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22" presentation:style-name="a187" draw:name="Text Placeholder 2" svg:x="0.78993in" svg:y="3.17882in" svg:width="8.5in" svg:height="1.64062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23" presentation:style-name="a192" draw:name="Date Placeholder 3" svg:x="0.5in" svg:y="6.95139in" svg:width="2.33333in" svg:height="0.39931in" presentation:class="date-time" presentation:placeholder="false">
        <draw:text-box>
          <text:p text:style-name="a191" text:class-names="" text:cond-style-name=""><text:span text:style-name="a188" text:class-names=""><text:date text:fixed="false" style:data-style-name="a189">1/27/13</text:date></text:span><text:span text:style-name="a190" text:class-names=""/></text:p>
        </draw:text-box>
        <svg:title/>
        <svg:desc/>
      </draw:frame>
      <draw:frame draw:id="id24" presentation:style-name="a195" draw:name="Footer Placeholder 4" svg:x="3.41667in" svg:y="6.95139in" svg:width="3.16667in" svg:height="0.39931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25" presentation:style-name="a199" draw:name="Slide Number Placeholder 5" svg:x="7.16667in" svg:y="6.95139in" svg:width="2.33333in" svg:height="0.39931in" presentation:class="page-number" presentation:placeholder="false">
        <draw:text-box>
          <text:p text:style-name="a198" text:class-names="" text:cond-style-name=""><text:span text:style-name="a196" text:class-names=""><text:page-number style:num-format="1" text:fixed="false">‹#›</text:page-number></text:span><text:span text:style-name="a197" text:class-names=""/></text:p>
        </draw:text-box>
        <svg:title/>
        <svg:desc/>
      </draw:frame>
      <presentation:notes style:page-layout-name="pageLayout2" draw:style-name="a229">
        <draw:frame draw:id="id5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6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Slide Image Placeholder 3">
          <svg:title/>
          <svg:desc/>
        </draw:page-thumbnail>
        <draw:frame draw:id="id8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Click to 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frame draw:id="id26" presentation:style-name="a234" draw:name="Title 1" svg:x="0.5in" svg:y="0.30035in" svg:width="9in" svg:height="1.25in" presentation:class="title" presentation:placeholder="false">
        <draw:text-box>
          <text:p text:style-name="a233" text:class-names="" text:cond-style-name=""><text:span text:style-name="a231" text:class-names="">Click to edit Master title style</text:span><text:span text:style-name="a232" text:class-names=""/></text:p>
        </draw:text-box>
        <svg:title/>
        <svg:desc/>
      </draw:frame>
      <draw:frame draw:id="id27" presentation:style-name="a251" draw:name="Content Placeholder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8" draw:name="Content Placeholder 3" svg:x="5.08333in" svg:y="1.75in" svg:width="4.41667in" svg:height="4.94965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3" draw:name="Date Placeholder 4" svg:x="0.5in" svg:y="6.95139in" svg:width="2.33333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1/27/13</text:date></text:span><text:span text:style-name="a271" text:class-names=""/></text:p>
        </draw:text-box>
        <svg:title/>
        <svg:desc/>
      </draw:frame>
      <draw:frame draw:id="id30" presentation:style-name="a276" draw:name="Footer Placeholder 5" svg:x="3.41667in" svg:y="6.95139in" svg:width="3.16667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1" presentation:style-name="a280" draw:name="Slide Number Placeholder 6" svg:x="7.16667in" svg:y="6.95139in" svg:width="2.33333in" svg:height="0.39931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>‹#›</text:page-number></text:span><text:span text:style-name="a278" text:class-names=""/></text:p>
        </draw:text-box>
        <svg:title/>
        <svg:desc/>
      </draw:frame>
      <presentation:notes style:page-layout-name="pageLayout2" draw:style-name="a310">
        <draw:frame draw:id="id5" presentation:style-name="a283" draw:name="Header Placeholder 1" svg:x="0in" svg:y="0in" svg:width="3.25in" svg:height="0.5017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6" presentation:style-name="a287" draw:name="Date Placeholder 2" svg:x="4.24826in" svg:y="0in" svg:width="3.25in" svg:height="0.50174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8" draw:name="Slide Image Placeholder 3">
          <svg:title/>
          <svg:desc/>
        </draw:page-thumbnail>
        <draw:frame draw:id="id8" presentation:style-name="a303" draw:name="Notes Placeholder 4" svg:x="0.75in" svg:y="4.8125in" svg:width="6in" svg:height="3.9375in" presentation:class="notes" presentation:placeholder="false">
          <draw:text-box>
            <text:p text:style-name="a290" text:class-names="" text:cond-style-name=""><text:span text:style-name="a289" text:class-names="">Click to edit Master text styles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Second level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6" draw:name="Footer Placeholder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0" presentation:style-name="a309" draw:name="Slide Number Placehold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32" presentation:style-name="a315" draw:name="Title 1" svg:x="0.5in" svg:y="0.30035in" svg:width="9in" svg:height="1.25in" presentation:class="title" presentation:placeholder="false">
        <draw:text-box>
          <text:p text:style-name="a314" text:class-names="" text:cond-style-name=""><text:span text:style-name="a312" text:class-names="">Click to edit Master title style</text:span><text:span text:style-name="a313" text:class-names=""/></text:p>
        </draw:text-box>
        <svg:title/>
        <svg:desc/>
      </draw:frame>
      <draw:frame draw:id="id33" presentation:style-name="a319" draw:name="Text Placeholder 2" svg:x="0.5in" svg:y="1.67882in" svg:width="4.4184in" svg:height="0.69965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</draw:text-box>
        <svg:title/>
        <svg:desc/>
      </draw:frame>
      <draw:frame draw:id="id34" presentation:style-name="a336" draw:name="Content Placeholder 3" svg:x="0.5in" svg:y="2.37847in" svg:width="4.4184in" svg:height="4.32118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0" draw:name="Text Placeholder 4" svg:x="5.07986in" svg:y="1.67882in" svg:width="4.42014in" svg:height="0.69965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36" presentation:style-name="a357" draw:name="Content Placeholder 5" svg:x="5.07986in" svg:y="2.37847in" svg:width="4.42014in" svg:height="4.32118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2" draw:name="Date Placeholder 6" svg:x="0.5in" svg:y="6.95139in" svg:width="2.3333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/27/13</text:date></text:span><text:span text:style-name="a360" text:class-names=""/></text:p>
        </draw:text-box>
        <svg:title/>
        <svg:desc/>
      </draw:frame>
      <draw:frame draw:id="id38" presentation:style-name="a365" draw:name="Footer Placeholder 7" svg:x="3.41667in" svg:y="6.95139in" svg:width="3.16667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39" presentation:style-name="a369" draw:name="Slide Number Placeholder 8" svg:x="7.16667in" svg:y="6.95139in" svg:width="2.3333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399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6" draw:name="Date Placeholder 2" svg:x="4.24826in" svg:y="0in" svg:width="3.25in" svg:height="0.50174in" presentation:class="date-time" presentation:placeholder="false">
          <draw:text-box>
            <text:p text:style-name="a375" text:class-names="" text:cond-style-name=""><text:span text:style-name="a373" text:class-names=""><text:date text:fixed="false" style:data-style-name="a374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7" draw:name="Slide Image Placeholder 3">
          <svg:title/>
          <svg:desc/>
        </draw:page-thumbnail>
        <draw:frame draw:id="id8" presentation:style-name="a392" draw:name="Notes Placeholder 4" svg:x="0.75in" svg:y="4.8125in" svg:width="6in" svg:height="3.9375in" presentation:class="notes" presentation:placeholder="false">
          <draw:text-box>
            <text:p text:style-name="a379" text:class-names="" text:cond-style-name=""><text:span text:style-name="a378" text:class-names="">Click to edit Master text styles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Second level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p text:style-name="a387" text:class-names="" text:cond-style-name=""><text:span text:style-name="a3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5" draw:name="Footer Placeholder 5" svg:x="0in" svg:y="9.49826in" svg:width="3.25in" svg:height="0.50174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0" presentation:style-name="a398" draw:name="Slide Number Placeholder 6" svg:x="4.24826in" svg:y="9.49826in" svg:width="3.25in" svg:height="0.50174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0">
      <draw:frame draw:id="id40" presentation:style-name="a404" draw:name="Title 1" svg:x="0.5in" svg:y="0.30035in" svg:width="9in" svg:height="1.25in" presentation:class="title" presentation:placeholder="false">
        <draw:text-box>
          <text:p text:style-name="a403" text:class-names="" text:cond-style-name=""><text:span text:style-name="a401" text:class-names="">Click to edit Master title style</text:span><text:span text:style-name="a402" text:class-names=""/></text:p>
        </draw:text-box>
        <svg:title/>
        <svg:desc/>
      </draw:frame>
      <draw:frame draw:id="id41" presentation:style-name="a409" draw:name="Date Placeholder 2" svg:x="0.5in" svg:y="6.95139in" svg:width="2.33333in" svg:height="0.39931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>1/27/13</text:date></text:span><text:span text:style-name="a407" text:class-names=""/></text:p>
        </draw:text-box>
        <svg:title/>
        <svg:desc/>
      </draw:frame>
      <draw:frame draw:id="id42" presentation:style-name="a412" draw:name="Footer Placeholder 3" svg:x="3.41667in" svg:y="6.95139in" svg:width="3.16667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43" presentation:style-name="a416" draw:name="Slide Number Placeholder 4" svg:x="7.16667in" svg:y="6.95139in" svg:width="2.33333in" svg:height="0.39931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</draw:text-box>
        <svg:title/>
        <svg:desc/>
      </draw:frame>
      <presentation:notes style:page-layout-name="pageLayout2" draw:style-name="a446">
        <draw:frame draw:id="id5" presentation:style-name="a419" draw:name="Header Placeholder 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6" presentation:style-name="a423" draw:name="Date Placeholder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4" draw:name="Slide Image Placeholder 3">
          <svg:title/>
          <svg:desc/>
        </draw:page-thumbnail>
        <draw:frame draw:id="id8" presentation:style-name="a439" draw:name="Notes Placeholder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Click to edit Master text styles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 level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2" draw:name="Footer Placeholder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Slide Number Placehold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44" presentation:style-name="a452" draw:name="Date Placeholder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/27/13</text:date></text:span><text:span text:style-name="a450" text:class-names=""/></text:p>
        </draw:text-box>
        <svg:title/>
        <svg:desc/>
      </draw:frame>
      <draw:frame draw:id="id45" presentation:style-name="a455" draw:name="Footer Placeholder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lide Number Placeholder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89">
        <draw:frame draw:id="id5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7" draw:name="Slide Image Placeholder 3">
          <svg:title/>
          <svg:desc/>
        </draw:page-thumbnail>
        <draw:frame draw:id="id8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0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0">
      <draw:frame draw:id="id47" presentation:style-name="a494" draw:name="Title 1" svg:x="0.5in" svg:y="0.29861in" svg:width="3.28993in" svg:height="1.27083in" presentation:class="title" presentation:placeholder="false">
        <draw:text-box>
          <text:p text:style-name="a493" text:class-names="" text:cond-style-name=""><text:span text:style-name="a491" text:class-names="">Click to edit Master title style</text:span><text:span text:style-name="a492" text:class-names=""/></text:p>
        </draw:text-box>
        <svg:title/>
        <svg:desc/>
      </draw:frame>
      <draw:frame draw:id="id48" presentation:style-name="a511" draw:name="Content Placeholder 2" svg:x="3.90972in" svg:y="0.29861in" svg:width="5.59028in" svg:height="6.40104in" presentation:class="object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Second level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hird level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Fifth level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Text Placeholder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50" presentation:style-name="a520" draw:name="Date Placeholder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/27/13</text:date></text:span><text:span text:style-name="a518" text:class-names=""/></text:p>
        </draw:text-box>
        <svg:title/>
        <svg:desc/>
      </draw:frame>
      <draw:frame draw:id="id51" presentation:style-name="a523" draw:name="Footer Placeholder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lide Number Placeholder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7">
        <draw:frame draw:id="id5" presentation:style-name="a530" draw:name="Header Placehold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4" draw:name="Date Placeholder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35" draw:name="Slide Image Placeholder 3">
          <svg:title/>
          <svg:desc/>
        </draw:page-thumbnail>
        <draw:frame draw:id="id8" presentation:style-name="a550" draw:name="Notes Placeholder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Click to edit Master text styles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 level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3" draw:name="Footer Placeholder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Slide Number Placeholder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8">
      <draw:frame draw:id="id53" presentation:style-name="a562" draw:name="Title 1" svg:x="1.96007in" svg:y="5.25in" svg:width="6in" svg:height="0.61979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54" presentation:style-name="a565" draw:name="Picture Placeholder 2" svg:x="1.96007in" svg:y="0.67014in" svg:width="6in" svg:height="4.5in" presentation:class="graphic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55" presentation:style-name="a569" draw:name="Text Placeholder 3" svg:x="1.96007in" svg:y="5.86979in" svg:width="6in" svg:height="0.8802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</draw:text-box>
        <svg:title/>
        <svg:desc/>
      </draw:frame>
      <draw:frame draw:id="id56" presentation:style-name="a574" draw:name="Date Placeholder 4" svg:x="0.5in" svg:y="6.95139in" svg:width="2.33333in" svg:height="0.39931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>1/27/13</text:date></text:span><text:span text:style-name="a572" text:class-names=""/></text:p>
        </draw:text-box>
        <svg:title/>
        <svg:desc/>
      </draw:frame>
      <draw:frame draw:id="id57" presentation:style-name="a577" draw:name="Footer Placeholder 5" svg:x="3.41667in" svg:y="6.95139in" svg:width="3.1666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58" presentation:style-name="a581" draw:name="Slide Number Placeholder 6" svg:x="7.16667in" svg:y="6.95139in" svg:width="2.33333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>‹#›</text:page-number></text:span><text:span text:style-name="a579" text:class-names=""/></text:p>
        </draw:text-box>
        <svg:title/>
        <svg:desc/>
      </draw:frame>
      <presentation:notes style:page-layout-name="pageLayout2" draw:style-name="a611">
        <draw:frame draw:id="id5" presentation:style-name="a584" draw:name="Header Placeholder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6" presentation:style-name="a588" draw:name="Date Placeholder 2" svg:x="4.24826in" svg:y="0in" svg:width="3.25in" svg:height="0.50174in" presentation:class="date-time" presentation:placeholder="false">
          <draw:text-box>
            <text:p text:style-name="a587" text:class-names="" text:cond-style-name=""><text:span text:style-name="a585" text:class-names=""><text:date text:fixed="false" style:data-style-name="a586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9" draw:name="Slide Image Placeholder 3">
          <svg:title/>
          <svg:desc/>
        </draw:page-thumbnail>
        <draw:frame draw:id="id8" presentation:style-name="a604" draw:name="Notes Placeholder 4" svg:x="0.75in" svg:y="4.8125in" svg:width="6in" svg:height="3.9375in" presentation:class="notes" presentation:placeholder="false">
          <draw:text-box>
            <text:p text:style-name="a591" text:class-names="" text:cond-style-name=""><text:span text:style-name="a590" text:class-names="">Click to edit Master text styles</text:span></text:p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Second level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p text:style-name="a599" text:class-names="" text:cond-style-name=""><text:span text:style-name="a5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7" draw:name="Footer Placeholder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24826in" svg:y="9.49826in" svg:width="3.25in" svg:height="0.50174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2">
      <draw:frame draw:id="id59" presentation:style-name="a616" draw:name="Title 1" svg:x="0.5in" svg:y="0.30035in" svg:width="9in" svg:height="1.25in" presentation:class="title" presentation:placeholder="false">
        <draw:text-box>
          <text:p text:style-name="a615" text:class-names="" text:cond-style-name=""><text:span text:style-name="a613" text:class-names="">Click to edit Master title style</text:span><text:span text:style-name="a614" text:class-names=""/></text:p>
        </draw:text-box>
        <svg:title/>
        <svg:desc/>
      </draw:frame>
      <draw:frame draw:id="id60" presentation:style-name="a633" draw:name="Vertical Text Placeholder 2" svg:x="0.5in" svg:y="1.75in" svg:width="9in" svg:height="4.949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ck to edit Master text styles</text:span></text:p>
            </text:list-item>
          </text:list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 level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hird level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29" text:class-names="">Fifth level</text:span><text:span text:style-name="a6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8" draw:name="Date Placeholder 3" svg:x="0.5in" svg:y="6.95139in" svg:width="2.33333in" svg:height="0.39931in" presentation:class="date-time" presentation:placeholder="false">
        <draw:text-box>
          <text:p text:style-name="a637" text:class-names="" text:cond-style-name=""><text:span text:style-name="a634" text:class-names=""><text:date text:fixed="false" style:data-style-name="a635">1/27/13</text:date></text:span><text:span text:style-name="a636" text:class-names=""/></text:p>
        </draw:text-box>
        <svg:title/>
        <svg:desc/>
      </draw:frame>
      <draw:frame draw:id="id62" presentation:style-name="a641" draw:name="Footer Placeholder 4" svg:x="3.41667in" svg:y="6.95139in" svg:width="3.16667in" svg:height="0.39931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63" presentation:style-name="a645" draw:name="Slide Number Placeholder 5" svg:x="7.16667in" svg:y="6.95139in" svg:width="2.33333in" svg:height="0.39931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>‹#›</text:page-number></text:span><text:span text:style-name="a643" text:class-names=""/></text:p>
        </draw:text-box>
        <svg:title/>
        <svg:desc/>
      </draw:frame>
      <presentation:notes style:page-layout-name="pageLayout2" draw:style-name="a675">
        <draw:frame draw:id="id5" presentation:style-name="a648" draw:name="Header Placeholder 1" svg:x="0in" svg:y="0in" svg:width="3.25in" svg:height="0.50174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6" presentation:style-name="a652" draw:name="Date Placeholder 2" svg:x="4.24826in" svg:y="0in" svg:width="3.25in" svg:height="0.50174in" presentation:class="date-time" presentation:placeholder="false">
          <draw:text-box>
            <text:p text:style-name="a651" text:class-names="" text:cond-style-name=""><text:span text:style-name="a649" text:class-names=""><text:date text:fixed="false" style:data-style-name="a650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3" draw:name="Slide Image Placeholder 3">
          <svg:title/>
          <svg:desc/>
        </draw:page-thumbnail>
        <draw:frame draw:id="id8" presentation:style-name="a668" draw:name="Notes Placeholder 4" svg:x="0.75in" svg:y="4.8125in" svg:width="6in" svg:height="3.9375in" presentation:class="notes" presentation:placeholder="false">
          <draw:text-box>
            <text:p text:style-name="a655" text:class-names="" text:cond-style-name=""><text:span text:style-name="a654" text:class-names="">Click to edit Master text styles</text:span></text:p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Second level</text:span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p text:style-name="a660" text:class-names="" text:cond-style-name=""><text:span text:style-name="a6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p text:style-name="a663" text:class-names="" text:cond-style-name=""><text:span text:style-name="a6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1" draw:name="Footer Placeholder 5" svg:x="0in" svg:y="9.49826in" svg:width="3.25in" svg:height="0.50174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Slide Number Placeholder 6" svg:x="4.24826in" svg:y="9.49826in" svg:width="3.25in" svg:height="0.50174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6">
      <draw:frame draw:id="id64" presentation:style-name="a680" draw:name="Vertical Title 1" svg:x="7.25in" svg:y="0.30035in" svg:width="2.25in" svg:height="6.39931in" presentation:class="title" presentation:placeholder="false">
        <draw:text-box>
          <text:p text:style-name="a679" text:class-names="" text:cond-style-name=""><text:span text:style-name="a677" text:class-names="">Click to edit Master title style</text:span><text:span text:style-name="a678" text:class-names=""/></text:p>
        </draw:text-box>
        <svg:title/>
        <svg:desc/>
      </draw:frame>
      <draw:frame draw:id="id65" presentation:style-name="a697" draw:name="Vertical Text Placeholder 2" svg:x="0.5in" svg:y="0.30035in" svg:width="6.58333in" svg:height="6.39931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Fifth level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2" draw:name="Date Placeholder 3" svg:x="0.5in" svg:y="6.95139in" svg:width="2.33333in" svg:height="0.39931in" presentation:class="date-time" presentation:placeholder="false">
        <draw:text-box>
          <text:p text:style-name="a701" text:class-names="" text:cond-style-name=""><text:span text:style-name="a698" text:class-names=""><text:date text:fixed="false" style:data-style-name="a699">1/27/13</text:date></text:span><text:span text:style-name="a700" text:class-names=""/></text:p>
        </draw:text-box>
        <svg:title/>
        <svg:desc/>
      </draw:frame>
      <draw:frame draw:id="id67" presentation:style-name="a705" draw:name="Footer Placeholder 4" svg:x="3.41667in" svg:y="6.95139in" svg:width="3.16667in" svg:height="0.39931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68" presentation:style-name="a709" draw:name="Slide Number Placeholder 5" svg:x="7.16667in" svg:y="6.95139in" svg:width="2.33333in" svg:height="0.39931in" presentation:class="page-number" presentation:placeholder="false">
        <draw:text-box>
          <text:p text:style-name="a708" text:class-names="" text:cond-style-name=""><text:span text:style-name="a706" text:class-names=""><text:page-number style:num-format="1" text:fixed="false">‹#›</text:page-number></text:span><text:span text:style-name="a707" text:class-names=""/></text:p>
        </draw:text-box>
        <svg:title/>
        <svg:desc/>
      </draw:frame>
      <presentation:notes style:page-layout-name="pageLayout2" draw:style-name="a739">
        <draw:frame draw:id="id5" presentation:style-name="a712" draw:name="Header Placeholder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6" presentation:style-name="a716" draw:name="Date Placeholder 2" svg:x="4.24826in" svg:y="0in" svg:width="3.25in" svg:height="0.50174in" presentation:class="date-time" presentation:placeholder="false">
          <draw:text-box>
            <text:p text:style-name="a715" text:class-names="" text:cond-style-name=""><text:span text:style-name="a713" text:class-names=""><text:date text:fixed="false" style:data-style-name="a714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7" draw:name="Slide Image Placeholder 3">
          <svg:title/>
          <svg:desc/>
        </draw:page-thumbnail>
        <draw:frame draw:id="id8" presentation:style-name="a732" draw:name="Notes Placeholder 4" svg:x="0.75in" svg:y="4.8125in" svg:width="6in" svg:height="3.9375in" presentation:class="notes" presentation:placeholder="false">
          <draw:text-box>
            <text:p text:style-name="a719" text:class-names="" text:cond-style-name=""><text:span text:style-name="a718" text:class-names="">Click to edit Master text styles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Second level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5" draw:name="Footer Placeholder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Slide Number Placeholder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dc:description>generated using python-pptx</dc:description>
    <dc:subject/>
    <meta:initial-creator/>
    <dc:creator>Steve Canny</dc:creator>
    <meta:creation-date>2013-01-27T09:14:16Z</meta:creation-date>
    <dc:date>2026-05-28T09:23:48Z</dc:date>
    <meta:editing-cycles>230</meta:editing-cycles>
    <meta:editing-duration>PT60S</meta:editing-duration>
    <meta:document-statistic meta:paragraph-count="0" meta:word-count="0"/>
  </office:meta>
</office:document-meta>
</file>